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1BAF1A836BB.png" manifest:media-type="image/png"/>
  <manifest:file-entry manifest:full-path="Pictures/100000000000025A0000021F206DF0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solid" draw:fill-color="#ffffa6"/>
    </style:style>
    <style:style style:name="P4" style:family="paragraph" style:parent-style-name="Standard">
      <style:paragraph-properties fo:break-before="page"/>
      <style:text-properties officeooo:rsid="002290d0" officeooo:paragraph-rsid="002290d0"/>
    </style:style>
    <style:style style:name="P5" style:family="paragraph" style:parent-style-name="Standard">
      <style:text-properties officeooo:rsid="002290d0" officeooo:paragraph-rsid="002290d0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ffa6" fo:min-height="1.15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2" draw:name="Shape 1" draw:style-name="gr1" draw:text-style-name="P2" svg:width="1.3441in" svg:height="0.7713in" svg:x="3.9752in" svg:y="2.8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1" draw:text-style-name="P2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4" draw:style-name="gr2" draw:text-style-name="P2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Text Frame 1" draw:style-name="gr3" draw:text-style-name="P3" svg:width="4.3969in" svg:height="1.1512in" svg:x="3.3181in" svg:y="0.1673in"><draw:text-box><text:p>/home/daveg/.local/putty_test.csv <text:s text:c="2"/>(Linux)</text:p><text:p>Or</text:p><text:p>/Users/daveg/.local/putty_test.csv <text:s/>(Darwin)</text:p><text:p>or</text:p><text:p>C:\Users\daveg\AppData\Local\Temp\putty_test.csv (Windows</text:p></draw:text-box></draw:frame>Same as ‘def’ except log file location <text:span text:style-name="T1">and terminal </text:span><draw:frame draw:style-name="fr1" draw:name="Image2" text:anchor-type="char" svg:x="0.6083in" svg:y="5.2252in" svg:width="4.7083in" svg:height="4.6043in" draw:z-index="1"><draw:image xlink:href="Pictures/10000000000001C4000001BAF1A836BB.png" xlink:type="simple" xlink:show="embed" xlink:actuate="onLoad" draw:mime-type="image/png"/></draw:frame><draw:frame draw:style-name="fr1" draw:name="Image3" text:anchor-type="char" svg:x="0.4457in" svg:y="0.3335in" svg:width="5.0165in" svg:height="4.5252in" draw:z-index="0"><draw:image xlink:href="Pictures/100000000000025A0000021F206DF0C9.png" xlink:type="simple" xlink:show="embed" xlink:actuate="onLoad" draw:mime-type="image/png"/></draw:frame></text:p>
      <text:p text:style-name="P4">open ‘PuTTY’ gui on test computer</text:p>
      <text:p text:style-name="P5">save a session for each test article, e.g.</text:p>
      <text:p text:style-name="P5"><text:tab/>&gt; Load ‘test’ in tab Session</text:p>
      <text:p text:style-name="P5"><text:tab/>&gt; change ‘Serial line’ from ‘COMx’ to whatever test article shows up as</text:p>
      <text:p text:style-name="P5"><text:tab/>&gt; type ‘testpro0p’ in the ‘Saved Sessions’ box. <text:s/>This must correspond to ‘putty_connection’ at the top of py/GUI_TestSOC.py. <text:s/>Change things until they <text:s/>match</text:p>
      <text:p text:style-name="P5"><text:tab/>&gt; press ‘Save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5-23T04:31:15.847000000</meta:creation-date>
    <dc:date>2026-01-01T05:28:13.285256900</dc:date>
    <meta:editing-duration>PT19M37S</meta:editing-duration>
    <meta:editing-cycles>11</meta:editing-cycles>
    <meta:generator>LibreOffice/25.2.7.2$Windows_X86_64 LibreOffice_project/5cbfd1ab6520636bb5f7b99185aa69bd7456825d</meta:generator>
    <meta:document-statistic meta:table-count="0" meta:image-count="2" meta:object-count="0" meta:page-count="2" meta:paragraph-count="8" meta:word-count="79" meta:character-count="478" meta:non-whitespace-character-count="399"/>
  </office:meta>
</office:document-meta>
</file>