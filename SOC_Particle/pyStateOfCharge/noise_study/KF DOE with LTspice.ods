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780000003FC5D8FC02B.png" manifest:media-type="image/png"/>
  <manifest:file-entry manifest:full-path="Pictures/1000000000000780000003FC0532A520.png" manifest:media-type="image/png"/>
  <manifest:file-entry manifest:full-path="Pictures/1000000000000780000003FCBF5B7BDF.png" manifest:media-type="image/png"/>
  <manifest:file-entry manifest:full-path="Pictures/1000000000000780000003FC4928D70F.png" manifest:media-type="image/png"/>
  <manifest:file-entry manifest:full-path="Pictures/1000000000000780000003FCE2335CEA.png" manifest:media-type="image/png"/>
  <manifest:file-entry manifest:full-path="Pictures/100000000000077C0000035100477DE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2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 style:data-style-name="N2"/>
    <style:style style:name="ce2" style:family="table-cell" style:parent-style-name="Default" style:data-style-name="N139"/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>
      <style:table-cell-properties fo:background-color="transparent"/>
    </style:style>
    <style:style style:name="ce6" style:family="table-cell" style:parent-style-name="Default" style:data-style-name="N139">
      <style:table-cell-properties fo:background-color="transparent"/>
    </style:style>
    <style:style style:name="ce7" style:family="table-cell" style:parent-style-name="Default" style:data-style-name="N139">
      <style:table-cell-properties fo:background-color="#bbe33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ise Desc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39" table:default-cell-style-name="Default"/>
        <table:table-row table:style-name="ro1">
          <table:table-cell>
            <draw:frame draw:z-index="0" draw:name="Image 1" draw:style-name="gr1" draw:text-style-name="P1" svg:width="5.5134in" svg:height="2.9567in" svg:x="0.0043in" svg:y="0in">
              <draw:image xlink:href="Pictures/1000000000000780000003FC5D8FC02B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>
            <draw:frame draw:z-index="1" draw:name="Image 2" draw:style-name="gr1" draw:text-style-name="P1" svg:width="5.4398in" svg:height="2.9173in" svg:x="0.3953in" svg:y="0in">
              <draw:image xlink:href="Pictures/1000000000000780000003FCBF5B7BDF.png" xlink:type="simple" xlink:show="embed" xlink:actuate="onLoad" draw:mime-type="image/png">
                <text:p/>
              </draw:image>
            </draw:frame>
          </table:table-cell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12"/>
          <table:table-cell>
            <draw:frame draw:z-index="3" draw:name="Image 4" draw:style-name="gr1" draw:text-style-name="P1" svg:width="16.0996in" svg:height="8.639in" svg:x="0.1992in" svg:y="0.0004in">
              <draw:image xlink:href="Pictures/1000000000000780000003FC4928D70F.png" xlink:type="simple" xlink:show="embed" xlink:actuate="onLoad" draw:mime-type="image/png">
                <text:p/>
              </draw:image>
            </draw:frame>
          </table:table-cell>
          <table:table-cell table:number-columns-repeated="35"/>
        </table:table-row>
        <table:table-row table:style-name="ro1" table:number-rows-repeated="14">
          <table:table-cell table:number-columns-repeated="48"/>
        </table:table-row>
        <table:table-row table:style-name="ro1">
          <table:table-cell/>
          <table:table-cell office:value-type="string" calcext:value-type="string">
            <text:p>Von</text:p>
          </table:table-cell>
          <table:table-cell table:number-columns-repeated="7"/>
          <table:table-cell office:value-type="string" calcext:value-type="string">
            <text:p>Vcn</text:p>
          </table:table-cell>
          <table:table-cell table:number-columns-repeated="38"/>
        </table:table-row>
        <table:table-row table:style-name="ro1">
          <table:table-cell>
            <draw:frame draw:z-index="2" draw:name="Image 3" draw:style-name="gr1" draw:text-style-name="P1" svg:width="5.4799in" svg:height="2.939in" svg:x="0in" svg:y="0.0988in">
              <draw:image xlink:href="Pictures/1000000000000780000003FC0532A520.png" xlink:type="simple" xlink:show="embed" xlink:actuate="onLoad" draw:mime-type="image/png">
                <text:p/>
              </draw:image>
            </draw:frame>
          </table:table-cell>
          <table:table-cell table:number-columns-repeated="47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7"/>
          <table:table-cell office:value-type="string" calcext:value-type="string">
            <text:p>Remarks</text:p>
          </table:table-cell>
          <table:table-cell table:number-columns-repeated="40"/>
        </table:table-row>
        <table:table-row table:style-name="ro1">
          <table:table-cell table:number-columns-repeated="7"/>
          <table:table-cell office:value-type="string" calcext:value-type="string">
            <text:p>Gain of amp is ~20</text:p>
          </table:table-cell>
          <table:table-cell table:number-columns-repeated="40"/>
        </table:table-row>
        <table:table-row table:style-name="ro1">
          <table:table-cell table:number-columns-repeated="7"/>
          <table:table-cell office:value-type="string" calcext:value-type="string">
            <text:p>Root cause is 1.5 Hz noise on V3v3 introduced by noise in V5v from high energy BT device</text:p>
          </table:table-cell>
          <table:table-cell table:number-columns-repeated="40"/>
        </table:table-row>
        <table:table-row table:style-name="ro1">
          <table:table-cell table:number-columns-repeated="7"/>
          <table:table-cell office:value-type="string" calcext:value-type="string">
            <text:p>Presumably noise is common mode Vc=Vr on amp</text:p>
          </table:table-cell>
          <table:table-cell table:number-columns-repeated="40"/>
        </table:table-row>
        <table:table-row table:style-name="ro1">
          <table:table-cell table:number-columns-repeated="7"/>
          <table:table-cell office:value-type="string" calcext:value-type="string">
            <text:p>Filtering in amplifier may be stopping ability of Vo – Vn differential from working</text:p>
          </table:table-cell>
          <table:table-cell table:number-columns-repeated="40"/>
        </table:table-row>
        <table:table-row table:style-name="ro1">
          <table:table-cell table:number-columns-repeated="7"/>
          <table:table-cell office:value-type="string" calcext:value-type="string">
            <text:p>Could try removing Capacitor in the Vr path of amplifier</text:p>
          </table:table-cell>
          <table:table-cell table:number-columns-repeated="40"/>
        </table:table-row>
        <table:table-row table:style-name="ro1">
          <table:table-cell table:number-columns-repeated="7"/>
          <table:table-cell office:value-type="string" calcext:value-type="string">
            <text:p>Check this idea in LTSpice; fix that model by putting 1 Hz signal on V3v3</text:p>
          </table:table-cell>
          <table:table-cell table:number-columns-repeated="40"/>
        </table:table-row>
        <table:table-row table:style-name="ro1">
          <table:table-cell table:number-columns-repeated="8"/>
          <table:table-cell office:value-type="string" calcext:value-type="string">
            <text:p>--&gt; LT spice says differential should get rid of 1.5 Hz but not random</text:p>
          </table:table-cell>
          <table:table-cell table:number-columns-repeated="39"/>
        </table:table-row>
        <table:table-row table:style-name="ro1">
          <table:table-cell table:number-columns-repeated="8"/>
          <table:table-cell office:value-type="string" calcext:value-type="string">
            <text:p>--&gt; actual BT noise is neither random nor pure 1.5 Hz so differential may not help</text:p>
          </table:table-cell>
          <table:table-cell table:number-columns-repeated="39"/>
        </table:table-row>
        <table:table-row table:style-name="ro1">
          <table:table-cell table:number-columns-repeated="7"/>
          <table:table-cell office:value-type="string" calcext:value-type="string">
            <text:p>Fiixes</text:p>
          </table:table-cell>
          <table:table-cell table:number-columns-repeated="40"/>
        </table:table-row>
        <table:table-row table:style-name="ro1">
          <table:table-cell table:number-columns-repeated="7"/>
          <table:table-cell office:value-type="string" calcext:value-type="string">
            <text:p>KF on Vo-Vc or Vo or Vc. <text:s/>→ <text:s/>Vo-Vc is as effective as filtering each then subtracting</text:p>
          </table:table-cell>
          <table:table-cell table:number-columns-repeated="40"/>
        </table:table-row>
        <table:table-row table:style-name="ro1">
          <table:table-cell table:number-columns-repeated="7"/>
          <table:table-cell office:value-type="string" calcext:value-type="string">
            <text:p>Precision Vc device</text:p>
          </table:table-cell>
          <table:table-cell table:number-columns-repeated="40"/>
        </table:table-row>
        <table:table-row table:style-name="ro1">
          <table:table-cell table:number-columns-repeated="7"/>
          <table:table-cell office:value-type="string" calcext:value-type="string">
            <text:p>Remove BT device</text:p>
          </table:table-cell>
          <table:table-cell table:number-columns-repeated="40"/>
        </table:table-row>
        <table:table-row table:style-name="ro1">
          <table:table-cell table:number-columns-repeated="7"/>
          <table:table-cell office:value-type="string" calcext:value-type="string">
            <text:p>Replace high energy with BLE (Serial port monitor avail?)</text:p>
          </table:table-cell>
          <table:table-cell table:number-columns-repeated="40"/>
        </table:table-row>
        <table:table-row table:style-name="ro1">
          <table:table-cell table:number-columns-repeated="8"/>
          <table:table-cell office:value-type="string" calcext:value-type="string">
            <text:p>LightBlue</text:p>
          </table:table-cell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Von – Vcn</text:p>
          </table:table-cell>
          <table:table-cell table:number-columns-repeated="5"/>
          <table:table-cell office:value-type="string" calcext:value-type="string">
            <text:p>nRF</text:p>
          </table:table-cell>
          <table:table-cell table:number-columns-repeated="39"/>
        </table:table-row>
        <table:table-row table:style-name="ro2">
          <table:table-cell table:number-columns-repeated="8"/>
          <table:table-cell table:style-name="ce1" office:value-type="string" calcext:value-type="string">
            <text:p>BLE Serial Terminal V2 </text:p>
          </table:table-cell>
          <table:table-cell table:number-columns-repeated="39"/>
        </table:table-row>
        <table:table-row table:style-name="ro1">
          <table:table-cell table:number-columns-repeated="7"/>
          <table:table-cell office:value-type="string" calcext:value-type="string">
            <text:p>Photon 2 BLE Peripheral</text:p>
          </table:table-cell>
          <table:table-cell table:number-columns-repeated="40"/>
        </table:table-row>
        <table:table-row table:style-name="ro1">
          <table:table-cell table:number-columns-repeated="8"/>
          <table:table-cell office:value-type="string" calcext:value-type="string">
            <text:p>BLE.advertise()</text:p>
          </table:table-cell>
          <table:table-cell table:style-name="ce8" office:value-type="string" calcext:value-type="string">
            <text:p>https://www.google.com/search?q=examples+like+serial.read+and+serial.write+using+BLE+advertise+function+for+Particle+Photon+2&amp;client=firefox-b-1-d&amp;hs=DINU&amp;sca_esv=fbedcc24c5cb00e9&amp;sxsrf=AE3TifNS_Biofs0paL1HMAcW6EqNmh6oSQ%3A1766654724432&amp;ei=BANNacGUGq2lptQP7o3hqQI&amp;ved=0ahUKEwjBpqnatdiRAxWtkokEHe5GOCUQ4dUDCBE&amp;uact=5&amp;oq=examples+like+serial.read+and+serial.write+using+BLE+advertise+function+for+Particle+Photon+2&amp;gs_lp=Egxnd3Mtd2l6LXNlcnAiXWV4YW1wbGVzIGxpa2Ugc2VyaWFsLnJlYWQgYW5kIHNlcmlhbC53cml0ZSB1c2luZyBCTEUgYWR2ZXJ0aXNlIGZ1bmN0aW9uIGZvciBQYXJ0aWNsZSBQaG90b24gMkiOclD6H1ixbnABeAGQAQCYAaQBoAHUHaoBBTEwLjI0uAEDyAEA-AEBmAIDoAKGAsICChAAGLADGNYEGEfCAgcQIxiwAhgnwgIFEAAY7wXCAggQABiABBiiBJgDAIgGAZAGCJIHAzEuMqAHqE2yBwMwLjK4B_gBwgcHMC4xLjEuMcgHEIAIAA&amp;sclient=gws-wiz-serp</text:p>
          </table:table-cell>
          <table:table-cell table:style-name="ce9" table:number-columns-repeated="38"/>
        </table:table-row>
        <table:table-row table:style-name="ro1">
          <table:table-cell table:number-columns-repeated="8"/>
          <table:table-cell office:value-type="string" calcext:value-type="string">
            <text:p>characteristic.read()</text:p>
          </table:table-cell>
          <table:table-cell table:number-columns-repeated="39"/>
        </table:table-row>
        <table:table-row table:style-name="ro1">
          <table:table-cell table:number-columns-repeated="8"/>
          <table:table-cell office:value-type="string" calcext:value-type="string">
            <text:p>characteristic.write(data)</text:p>
          </table:table-cell>
          <table:table-cell table:number-columns-repeated="39"/>
        </table:table-row>
        <table:table-row table:style-name="ro1" table:number-rows-repeated="13">
          <table:table-cell table:number-columns-repeated="48"/>
        </table:table-row>
        <table:table-row table:style-name="ro1">
          <table:table-cell table:number-columns-repeated="10"/>
          <table:table-cell>
            <draw:frame draw:z-index="4" draw:name="Image 5" draw:style-name="gr1" draw:text-style-name="P1" svg:width="16.0996in" svg:height="8.639in" svg:x="0in" svg:y="0in">
              <draw:image xlink:href="Pictures/1000000000000780000003FCE2335CEA.png" xlink:type="simple" xlink:show="embed" xlink:actuate="onLoad" draw:mime-type="image/png">
                <text:p/>
              </draw:image>
            </draw:frame>
          </table:table-cell>
          <table:table-cell table:number-columns-repeated="37"/>
        </table:table-row>
        <table:table-row table:style-name="ro1" table:number-rows-repeated="24">
          <table:table-cell table:number-columns-repeated="48"/>
        </table:table-row>
        <table:table-row table:style-name="ro1">
          <table:table-cell>
            <draw:frame draw:z-index="5" draw:name="Image 6" draw:style-name="gr1" draw:text-style-name="P1" svg:width="8.7327in" svg:height="3.9083in" svg:x="0in" svg:y="0.0031in">
              <draw:image xlink:href="Pictures/100000000000077C0000035100477DEE.png" xlink:type="simple" xlink:show="embed" xlink:actuate="onLoad" draw:mime-type="image/png">
                <text:p/>
              </draw:image>
            </draw:frame>
          </table:table-cell>
          <table:table-cell table:number-columns-repeated="47"/>
        </table:table-row>
        <table:table-row table:style-name="ro1" table:number-rows-repeated="22"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differential eliminates none of random noise (blue line is differential)</text:p>
          </table:table-cell>
          <table:table-cell table:number-columns-repeated="45"/>
        </table:table-row>
        <table:table-row table:style-name="ro1">
          <table:table-cell table:number-columns-repeated="14"/>
          <table:table-cell office:value-type="string" calcext:value-type="string">
            <text:p>differential eliminates 1.5 Hz if pure (blue line is differential)</text:p>
          </table:table-cell>
          <table:table-cell table:number-columns-repeated="33"/>
        </table:table-row>
      </table:table>
      <table:table table:name="Round 1" table:style-name="ta1">
        <table:shapes>
          <draw:frame draw:z-index="0" draw:style-name="gr2" draw:text-style-name="P1" svg:width="6.2988in" svg:height="3.5429in" svg:x="0.6209in" svg:y="1.4957in">
            <draw:object draw:notify-on-update-of-ranges="'Round 1'.A2:'Round 1'.A6 'Round 1'.E1:'Round 1'.E1 'Round 1'.E2:'Round 1'.E6 'Round 1'.A2:'Round 1'.A6 'Round 1'.H1:'Round 1'.H1 'Round 1'.H2:'Round 1'.H6 'Round 1'.A2:'Round 1'.A6 'Round 1'.K1:'Round 1'.K1 'Round 1'.K2:'Round 1'.K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1" svg:width="6.2988in" svg:height="3.5429in" svg:x="7.8551in" svg:y="1.0894in">
            <draw:object draw:notify-on-update-of-ranges="'Round 1'.B2:'Round 1'.B6 'Round 1'.E1:'Round 1'.E1 'Round 1'.E2:'Round 1'.E6 'Round 1'.B2:'Round 1'.B6 'Round 1'.H1:'Round 1'.H1 'Round 1'.H2:'Round 1'.H6 'Round 1'.B2:'Round 1'.B6 'Round 1'.K1:'Round 1'.K1 'Round 1'.K2:'Round 1'.K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6.2988in" svg:height="3.5429in" svg:x="3.2929in" svg:y="3.9677in">
            <draw:object draw:notify-on-update-of-ranges="'Round 1'.E2:'Round 1'.E6 'Round 1'.H1:'Round 1'.H1 'Round 1'.H2:'Round 1'.H6 'Round 1'.E2:'Round 1'.E6 'Round 1'.K1:'Round 1'.K1 'Round 1'.K2:'Round 1'.K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0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10"/>
        <table:table-column table:style-name="co1" table:number-columns-repeated="2" table:default-cell-style-name="Default"/>
        <table:table-column table:style-name="co1" table:default-cell-style-name="ce10"/>
        <table:table-row table:style-name="ro1">
          <table:table-cell office:value-type="string" calcext:value-type="string">
            <text:p>Qst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_p707, Hz</text:p>
          </table:table-cell>
          <table:table-cell table:style-name="Default" office:value-type="string" calcext:value-type="string">
            <text:p>w_p707, r/s</text:p>
          </table:table-cell>
          <table:table-cell table:style-name="Default" office:value-type="string" calcext:value-type="string">
            <text:p>tau, s</text:p>
          </table:table-cell>
          <table:table-cell office:value-type="string" calcext:value-type="string">
            <text:p>Von, p-p</text:p>
          </table:table-cell>
          <table:table-cell office:value-type="string" calcext:value-type="string">
            <text:p>VonF, v p-p</text:p>
          </table:table-cell>
          <table:table-cell table:style-name="Default" office:value-type="string" calcext:value-type="string">
            <text:p>Atten Von, dB</text:p>
          </table:table-cell>
          <table:table-cell office:value-type="string" calcext:value-type="string">
            <text:p>Voa, p-p</text:p>
          </table:table-cell>
          <table:table-cell office:value-type="string" calcext:value-type="string">
            <text:p>VoaF, v p-p</text:p>
          </table:table-cell>
          <table:table-cell table:style-name="Default" office:value-type="string" calcext:value-type="string">
            <text:p>Atten Voa, dB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" calcext:value-type="float">
            <text:p>1.1</text:p>
          </table:table-cell>
          <table:table-cell table:formula="of:=[.C2]*2*PI()" office:value-type="float" office:value="6.91150383789755" calcext:value-type="float">
            <text:p>6.91</text:p>
          </table:table-cell>
          <table:table-cell table:formula="of:=1/[.D2]" office:value-type="float" office:value="0.144686311901723" calcext:value-type="float">
            <text:p>0.145</text:p>
          </table:table-cell>
          <table:table-cell office:value-type="float" office:value="0.05" calcext:value-type="float">
            <text:p>0.05</text:p>
          </table:table-cell>
          <table:table-cell office:value-type="float" office:value="0.008" calcext:value-type="float">
            <text:p>0.008</text:p>
          </table:table-cell>
          <table:table-cell table:formula="of:=20*LOG10([.G2]/[.F2])" office:value-type="float" office:value="-15.9176003468815" calcext:value-type="float">
            <text:p>-15.92</text:p>
          </table:table-cell>
          <table:table-cell office:value-type="float" office:value="0.1" calcext:value-type="float">
            <text:p>0.1</text:p>
          </table:table-cell>
          <table:table-cell office:value-type="float" office:value="0.012" calcext:value-type="float">
            <text:p>0.012</text:p>
          </table:table-cell>
          <table:table-cell table:formula="of:=20*LOG10([.J2]/[.I2])" office:value-type="float" office:value="-18.4163750790475" calcext:value-type="float">
            <text:p>-18.42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01" calcext:value-type="float">
            <text:p>0.001</text:p>
          </table:table-cell>
          <table:table-cell office:value-type="float" office:value="1.7" calcext:value-type="float">
            <text:p>1.7</text:p>
          </table:table-cell>
          <table:table-cell table:formula="of:=[.C3]*2*PI()" office:value-type="float" office:value="10.6814150222053" calcext:value-type="float">
            <text:p>10.68</text:p>
          </table:table-cell>
          <table:table-cell table:formula="of:=1/[.D3]" office:value-type="float" office:value="0.0936205547599384" calcext:value-type="float">
            <text:p>0.094</text:p>
          </table:table-cell>
          <table:table-cell office:value-type="float" office:value="0.05" calcext:value-type="float">
            <text:p>0.05</text:p>
          </table:table-cell>
          <table:table-cell office:value-type="float" office:value="0.015" calcext:value-type="float">
            <text:p>0.015</text:p>
          </table:table-cell>
          <table:table-cell table:formula="of:=20*LOG10([.G3]/[.F3])" office:value-type="float" office:value="-10.4575749056068" calcext:value-type="float">
            <text:p>-10.46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table:formula="of:=20*LOG10([.J3]/[.I3])" office:value-type="float" office:value="-10.4575749056068" calcext:value-type="float">
            <text:p>-10.46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8" calcext:value-type="float">
            <text:p>0.88</text:p>
          </table:table-cell>
          <table:table-cell table:formula="of:=[.C4]*2*PI()" office:value-type="float" office:value="5.52920307031804" calcext:value-type="float">
            <text:p>5.53</text:p>
          </table:table-cell>
          <table:table-cell table:formula="of:=1/[.D4]" office:value-type="float" office:value="0.180857889877154" calcext:value-type="float">
            <text:p>0.181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table:formula="of:=20*LOG10([.G4]/[.F4])" office:value-type="float" office:value="-13.9794000867204" calcext:value-type="float">
            <text:p>-13.98</text:p>
          </table:table-cell>
          <table:table-cell office:value-type="float" office:value="0.1" calcext:value-type="float">
            <text:p>0.1</text:p>
          </table:table-cell>
          <table:table-cell office:value-type="float" office:value="0.007" calcext:value-type="float">
            <text:p>0.007</text:p>
          </table:table-cell>
          <table:table-cell table:formula="of:=20*LOG10([.J4]/[.I4])" office:value-type="float" office:value="-23.0980391997149" calcext:value-type="float">
            <text:p>-23.10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2" calcext:value-type="float">
            <text:p>0.002</text:p>
          </table:table-cell>
          <table:table-cell office:value-type="float" office:value="0.8" calcext:value-type="float">
            <text:p>0.8</text:p>
          </table:table-cell>
          <table:table-cell table:formula="of:=[.C5]*2*PI()" office:value-type="float" office:value="5.02654824574367" calcext:value-type="float">
            <text:p>5.03</text:p>
          </table:table-cell>
          <table:table-cell table:formula="of:=1/[.D5]" office:value-type="float" office:value="0.198943678864869" calcext:value-type="float">
            <text:p>0.199</text:p>
          </table:table-cell>
          <table:table-cell office:value-type="float" office:value="0.05" calcext:value-type="float">
            <text:p>0.05</text:p>
          </table:table-cell>
          <table:table-cell office:value-type="float" office:value="0.005" calcext:value-type="float">
            <text:p>0.005</text:p>
          </table:table-cell>
          <table:table-cell table:formula="of:=20*LOG10([.G5]/[.F5])" office:value-type="float" office:value="-20" calcext:value-type="float">
            <text:p>-20.00</text:p>
          </table:table-cell>
          <table:table-cell office:value-type="float" office:value="0.1" calcext:value-type="float">
            <text:p>0.1</text:p>
          </table:table-cell>
          <table:table-cell office:value-type="float" office:value="0.011" calcext:value-type="float">
            <text:p>0.011</text:p>
          </table:table-cell>
          <table:table-cell table:formula="of:=20*LOG10([.J5]/[.I5])" office:value-type="float" office:value="-19.1721462968355" calcext:value-type="float">
            <text:p>-19.1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1.62" calcext:value-type="float">
            <text:p>1.62</text:p>
          </table:table-cell>
          <table:table-cell table:formula="of:=[.C6]*2*PI()" office:value-type="float" office:value="10.1787601976309" calcext:value-type="float">
            <text:p>10.18</text:p>
          </table:table-cell>
          <table:table-cell table:formula="of:=1/[.D6]" office:value-type="float" office:value="0.0982437920320342" calcext:value-type="float">
            <text:p>0.098</text:p>
          </table:table-cell>
          <table:table-cell office:value-type="float" office:value="0.05" calcext:value-type="float">
            <text:p>0.05</text:p>
          </table:table-cell>
          <table:table-cell office:value-type="float" office:value="0.011" calcext:value-type="float">
            <text:p>0.011</text:p>
          </table:table-cell>
          <table:table-cell table:formula="of:=20*LOG10([.G6]/[.F6])" office:value-type="float" office:value="-13.1515463835559" calcext:value-type="float">
            <text:p>-13.15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table:formula="of:=20*LOG10([.J6]/[.I6])" office:value-type="float" office:value="-13.9794000867204" calcext:value-type="float">
            <text:p>-13.98</text:p>
          </table:table-cell>
        </table:table-row>
      </table:table>
      <table:table table:name="Round 1_2" table:style-name="ta1">
        <table:shapes>
          <draw:frame draw:z-index="0" draw:style-name="gr2" draw:text-style-name="P1" svg:width="6.2988in" svg:height="3.5429in" svg:x="0.6122in" svg:y="1.8173in">
            <draw:object draw:notify-on-update-of-ranges="'Round 1_2'.A2:'Round 1_2'.A6 'Round 1_2'.E1:'Round 1_2'.E1 'Round 1_2'.E2:'Round 1_2'.E6 'Round 1_2'.A2:'Round 1_2'.A6 'Round 1_2'.H1:'Round 1_2'.H1 'Round 1_2'.H2:'Round 1_2'.H6 'Round 1_2'.A2:'Round 1_2'.A6 'Round 1_2'.K1:'Round 1_2'.K1 'Round 1_2'.K2:'Round 1_2'.K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2" draw:text-style-name="P1" svg:width="6.2988in" svg:height="3.5429in" svg:x="7.8551in" svg:y="1.0894in">
            <draw:object draw:notify-on-update-of-ranges="'Round 1_2'.B2:'Round 1_2'.B6 'Round 1_2'.E1:'Round 1_2'.E1 'Round 1_2'.E2:'Round 1_2'.E6 'Round 1_2'.B2:'Round 1_2'.B6 'Round 1_2'.H1:'Round 1_2'.H1 'Round 1_2'.H2:'Round 1_2'.H6 'Round 1_2'.B2:'Round 1_2'.B6 'Round 1_2'.K1:'Round 1_2'.K1 'Round 1_2'.K2:'Round 1_2'.K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2" draw:text-style-name="P1" svg:width="6.2988in" svg:height="3.5429in" svg:x="3.2929in" svg:y="3.9677in">
            <draw:object draw:notify-on-update-of-ranges="'Round 1_2'.E2:'Round 1_2'.E6 'Round 1_2'.H1:'Round 1_2'.H1 'Round 1_2'.H2:'Round 1_2'.H6 'Round 1_2'.E2:'Round 1_2'.E6 'Round 1_2'.K1:'Round 1_2'.K1 'Round 1_2'.K2:'Round 1_2'.K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16373"/>
        <table:table-row table:style-name="ro1">
          <table:table-cell table:style-name="Default" office:value-type="string" calcext:value-type="string">
            <text:p>Qst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_p707, Hz</text:p>
          </table:table-cell>
          <table:table-cell table:style-name="Default" office:value-type="string" calcext:value-type="string">
            <text:p>w_p707, r/s</text:p>
          </table:table-cell>
          <table:table-cell office:value-type="string" calcext:value-type="string">
            <text:p>tau, s</text:p>
          </table:table-cell>
          <table:table-cell office:value-type="string" calcext:value-type="string">
            <text:p>Von, p-p</text:p>
          </table:table-cell>
          <table:table-cell office:value-type="string" calcext:value-type="string">
            <text:p>VonF, v p-p</text:p>
          </table:table-cell>
          <table:table-cell table:style-name="Default" office:value-type="string" calcext:value-type="string">
            <text:p>Atten Von, dB</text:p>
          </table:table-cell>
          <table:table-cell office:value-type="string" calcext:value-type="string">
            <text:p>Voa, p-p</text:p>
          </table:table-cell>
          <table:table-cell office:value-type="string" calcext:value-type="string">
            <text:p>VoaF, v p-p</text:p>
          </table:table-cell>
          <table:table-cell table:style-name="Default" office:value-type="string" calcext:value-type="string">
            <text:p>Atten Voa, dB</text:p>
          </table:table-cell>
          <table:table-cell table:style-name="Default" table:number-columns-repeated="16373"/>
        </table:table-row>
        <table:table-row table:style-name="ro1">
          <table:table-cell office:value-type="float" office:value="0.015" calcext:value-type="float">
            <text:p>0.015</text:p>
          </table:table-cell>
          <table:table-cell table:style-name="ce3" office:value-type="float" office:value="0.0005" calcext:value-type="float">
            <text:p>0.0005</text:p>
          </table:table-cell>
          <table:table-cell table:style-name="ce3" office:value-type="float" office:value="1.62" calcext:value-type="float">
            <text:p>1.62</text:p>
          </table:table-cell>
          <table:table-cell table:formula="of:=[.C2]*2*PI()" office:value-type="float" office:value="10.1787601976309" calcext:value-type="float">
            <text:p>10.18</text:p>
          </table:table-cell>
          <table:table-cell table:style-name="ce6" table:formula="of:=1/[.D2]" office:value-type="float" office:value="0.0982437920320342" calcext:value-type="float">
            <text:p>0.098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1" calcext:value-type="float">
            <text:p>0.011</text:p>
          </table:table-cell>
          <table:table-cell table:formula="of:=20*LOG10([.G2]/[.F2])" office:value-type="float" office:value="-13.1515463835559" calcext:value-type="float">
            <text:p>-13.1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2" calcext:value-type="float">
            <text:p>0.02</text:p>
          </table:table-cell>
          <table:table-cell table:formula="of:=20*LOG10([.J2]/[.I2])" office:value-type="float" office:value="-13.9794000867204" calcext:value-type="float">
            <text:p>-13.98</text:p>
          </table:table-cell>
          <table:table-cell table:style-name="ce3" table:number-columns-repeated="16373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style-name="ce3" office:value-type="float" office:value="0.0005" calcext:value-type="float">
            <text:p>0.0005</text:p>
          </table:table-cell>
          <table:table-cell table:style-name="ce3" office:value-type="float" office:value="2.3" calcext:value-type="float">
            <text:p>2.3</text:p>
          </table:table-cell>
          <table:table-cell table:formula="of:=[.C3]*2*PI()" office:value-type="float" office:value="14.451326206513" calcext:value-type="float">
            <text:p>14.45</text:p>
          </table:table-cell>
          <table:table-cell table:style-name="ce7" table:formula="of:=1/[.D3]" office:value-type="float" office:value="0.0691978013443023" calcext:value-type="float">
            <text:p>0.069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5" calcext:value-type="float">
            <text:p>0.015</text:p>
          </table:table-cell>
          <table:table-cell table:formula="of:=20*LOG10([.G3]/[.F3])" office:value-type="float" office:value="-10.4575749056068" calcext:value-type="float">
            <text:p>-10.46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18" calcext:value-type="float">
            <text:p>0.018</text:p>
          </table:table-cell>
          <table:table-cell table:formula="of:=20*LOG10([.J3]/[.I3])" office:value-type="float" office:value="-14.8945498979339" calcext:value-type="float">
            <text:p>-14.89</text:p>
          </table:table-cell>
          <table:table-cell table:style-name="ce3" table:number-columns-repeated="16373"/>
        </table:table-row>
        <table:table-row table:style-name="ro1">
          <table:table-cell office:value-type="float" office:value="0.0075" calcext:value-type="float">
            <text:p>0.0075</text:p>
          </table:table-cell>
          <table:table-cell table:style-name="ce3" office:value-type="float" office:value="0.0005" calcext:value-type="float">
            <text:p>0.0005</text:p>
          </table:table-cell>
          <table:table-cell table:style-name="ce3" office:value-type="float" office:value="1.305" calcext:value-type="float">
            <text:p>1.305</text:p>
          </table:table-cell>
          <table:table-cell table:formula="of:=[.C4]*2*PI()" office:value-type="float" office:value="8.19955682586936" calcext:value-type="float">
            <text:p>8.20</text:p>
          </table:table-cell>
          <table:table-cell table:style-name="ce6" table:formula="of:=1/[.D4]" office:value-type="float" office:value="0.121957810798387" calcext:value-type="float">
            <text:p>0.12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07" calcext:value-type="float">
            <text:p>0.007</text:p>
          </table:table-cell>
          <table:table-cell table:formula="of:=20*LOG10([.G4]/[.F4])" office:value-type="float" office:value="-17.0774392864352" calcext:value-type="float">
            <text:p>-17.08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1" calcext:value-type="float">
            <text:p>0.01</text:p>
          </table:table-cell>
          <table:table-cell table:formula="of:=20*LOG10([.J4]/[.I4])" office:value-type="float" office:value="-20" calcext:value-type="float">
            <text:p>-20.00</text:p>
          </table:table-cell>
          <table:table-cell table:style-name="ce3" table:number-columns-repeated="16373"/>
        </table:table-row>
        <table:table-row table:style-name="ro1">
          <table:table-cell office:value-type="float" office:value="0.015" calcext:value-type="float">
            <text:p>0.015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1.1" calcext:value-type="float">
            <text:p>1.1</text:p>
          </table:table-cell>
          <table:table-cell table:formula="of:=[.C5]*2*PI()" office:value-type="float" office:value="6.91150383789755" calcext:value-type="float">
            <text:p>6.91</text:p>
          </table:table-cell>
          <table:table-cell table:style-name="ce6" table:formula="of:=1/[.D5]" office:value-type="float" office:value="0.144686311901723" calcext:value-type="float">
            <text:p>0.14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08" calcext:value-type="float">
            <text:p>0.008</text:p>
          </table:table-cell>
          <table:table-cell table:formula="of:=20*LOG10([.G5]/[.F5])" office:value-type="float" office:value="-15.9176003468815" calcext:value-type="float">
            <text:p>-15.9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12" calcext:value-type="float">
            <text:p>0.012</text:p>
          </table:table-cell>
          <table:table-cell table:formula="of:=20*LOG10([.J5]/[.I5])" office:value-type="float" office:value="-18.4163750790475" calcext:value-type="float">
            <text:p>-18.42</text:p>
          </table:table-cell>
          <table:table-cell table:style-name="ce3" table:number-columns-repeated="16373"/>
        </table:table-row>
        <table:table-row table:style-name="ro1">
          <table:table-cell table:style-name="Default" office:value-type="float" office:value="0.015" calcext:value-type="float">
            <text:p>0.015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2.42" calcext:value-type="float">
            <text:p>2.42</text:p>
          </table:table-cell>
          <table:table-cell table:style-name="ce10" table:formula="of:=[.C6]*2*PI()" office:value-type="float" office:value="15.2053084433746" calcext:value-type="float">
            <text:p>15.21</text:p>
          </table:table-cell>
          <table:table-cell table:style-name="ce7" table:formula="of:=1/[.D6]" office:value-type="float" office:value="0.0657665054098741" calcext:value-type="float">
            <text:p>0.066</text:p>
          </table:table-cell>
          <table:table-cell office:value-type="float" office:value="0.05" calcext:value-type="float">
            <text:p>0.05</text:p>
          </table:table-cell>
          <table:table-cell office:value-type="float" office:value="0.015" calcext:value-type="float">
            <text:p>0.015</text:p>
          </table:table-cell>
          <table:table-cell table:style-name="ce10" table:formula="of:=20*LOG10([.G6]/[.F6])" office:value-type="float" office:value="-10.4575749056068" calcext:value-type="float">
            <text:p>-10.46</text:p>
          </table:table-cell>
          <table:table-cell office:value-type="float" office:value="0.1" calcext:value-type="float">
            <text:p>0.1</text:p>
          </table:table-cell>
          <table:table-cell office:value-type="float" office:value="0.022" calcext:value-type="float">
            <text:p>0.022</text:p>
          </table:table-cell>
          <table:table-cell table:style-name="ce10" table:formula="of:=20*LOG10([.J6]/[.I6])" office:value-type="float" office:value="-13.1515463835559" calcext:value-type="float">
            <text:p>-13.15</text:p>
          </table:table-cell>
          <table:table-cell table:style-name="Default" table:number-columns-repeated="1637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16374"/>
        </table:table-row>
        <table:table-row table:style-name="ro1">
          <table:table-cell table:style-name="ce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5">00/00/0000</text:date>, <text:time style:data-style-name="N2" text:time-value="03:49:54.551405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8T05:22:03.794589300</meta:creation-date>
    <dc:date>2025-12-25T04:57:47.799755500</dc:date>
    <meta:editing-duration>P1DT19M12S</meta:editing-duration>
    <meta:editing-cycles>16</meta:editing-cycles>
    <meta:generator>LibreOffice/25.2.7.2$Windows_X86_64 LibreOffice_project/5cbfd1ab6520636bb5f7b99185aa69bd7456825d</meta:generator>
    <meta:document-statistic meta:table-count="3" meta:cell-count="159" meta:object-count="1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3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9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ff00" draw:fill-color="#ffff00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up" chart:symbol-width="0.25cm" chart:symbol-height="0.25cm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00a933" draw:fill-color="#00a933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6.636cm" svg:y="0.316cm" chart:style-name="ch2">
          <text:p><text:span text:style-name="T1">DOE Vary R</text:span></text:p>
        </chart:title>
        <chart:legend chart:legend-position="end" svg:x="13.025cm" svg:y="3.694cm" style:legend-expansion="high" chart:style-name="ch3"/>
        <chart:plot-area chart:style-name="ch4" svg:x="0.32cm" svg:y="1.301cm" svg:width="12.385cm" svg:height="6.548cm">
          <chart:coordinate-region svg:x="1.591cm" svg:y="1.503cm" svg:width="9.962cm" svg:height="6.144cm"/>
          <chart:axis chart:dimension="x" chart:name="primary-x" chart:style-name="ch5">
            <chart:title svg:x="6.34cm" svg:y="8.029cm" chart:style-name="ch2">
              <text:p><text:span text:style-name="T2">R</text:span></text:p>
            </chart:title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'Round 1'.E2:'Round 1'.E6" chart:label-cell-address="'Round 1'.E1:'Round 1'.E1" chart:class="chart:scatter">
            <chart:domain table:cell-range-address="'Round 1'.B2:'Round 1'.B6"/>
            <chart:data-point chart:repeated="5"/>
          </chart:series>
          <chart:series chart:attached-axis="primary-y" chart:style-name="ch10" chart:values-cell-range-address="'Round 1'.H2:'Round 1'.H6" chart:label-cell-address="'Round 1'.H1:'Round 1'.H1" chart:class="chart:scatter">
            <chart:data-point chart:style-name="ch11"/>
            <chart:data-point chart:repeated="4"/>
          </chart:series>
          <chart:series chart:attached-axis="primary-y" chart:style-name="ch12" chart:values-cell-range-address="'Round 1'.K2:'Round 1'.K6" chart:label-cell-address="'Round 1'.K1:'Round 1'.K1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au, s</text:p>
                <draw:g>
                  <svg:desc>'Round 1'.E1:'Round 1'.E1</svg:desc>
                </draw:g>
              </table:table-cell>
              <table:table-cell office:value-type="string">
                <text:p>Atten Von, dB</text:p>
                <draw:g>
                  <svg:desc>'Round 1'.H1:'Round 1'.H1</svg:desc>
                </draw:g>
              </table:table-cell>
              <table:table-cell office:value-type="string">
                <text:p>Atten Voa, dB</text:p>
                <draw:g>
                  <svg:desc>'Round 1'.K1:'Round 1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'Round 1'.B2:'Round 1'.B6</svg:desc>
                </draw:g>
              </table:table-cell>
              <table:table-cell office:value-type="float" office:value="0.144686311901723">
                <text:p>0.144686311901723</text:p>
                <draw:g>
                  <svg:desc>'Round 1'.E2:'Round 1'.E6</svg:desc>
                </draw:g>
              </table:table-cell>
              <table:table-cell office:value-type="float" office:value="-15.9176003468815">
                <text:p>-15.9176003468815</text:p>
                <draw:g>
                  <svg:desc>'Round 1'.H2:'Round 1'.H6</svg:desc>
                </draw:g>
              </table:table-cell>
              <table:table-cell office:value-type="float" office:value="-18.4163750790475">
                <text:p>-18.4163750790475</text:p>
                <draw:g>
                  <svg:desc>'Round 1'.K2:'Round 1'.K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936205547599384">
                <text:p>0.0936205547599384</text:p>
              </table:table-cell>
              <table:table-cell office:value-type="float" office:value="-10.4575749056068">
                <text:p>-10.4575749056068</text:p>
              </table:table-cell>
              <table:table-cell office:value-type="float" office:value="-10.4575749056068">
                <text:p>-10.45757490560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">
                <text:p>0.001</text:p>
              </table:table-cell>
              <table:table-cell office:value-type="float" office:value="0.180857889877154">
                <text:p>0.180857889877154</text:p>
              </table:table-cell>
              <table:table-cell office:value-type="float" office:value="-13.9794000867204">
                <text:p>-13.9794000867204</text:p>
              </table:table-cell>
              <table:table-cell office:value-type="float" office:value="-23.0980391997149">
                <text:p>-23.0980391997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">
                <text:p>0.002</text:p>
              </table:table-cell>
              <table:table-cell office:value-type="float" office:value="0.198943678864869">
                <text:p>0.198943678864869</text:p>
              </table:table-cell>
              <table:table-cell office:value-type="float" office:value="-20">
                <text:p>-20</text:p>
              </table:table-cell>
              <table:table-cell office:value-type="float" office:value="-19.1721462968355">
                <text:p>-19.1721462968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5">
                <text:p>0.0005</text:p>
              </table:table-cell>
              <table:table-cell office:value-type="float" office:value="0.0982437920320342">
                <text:p>0.0982437920320342</text:p>
              </table:table-cell>
              <table:table-cell office:value-type="float" office:value="-13.1515463835559">
                <text:p>-13.1515463835559</text:p>
              </table:table-cell>
              <table:table-cell office:value-type="float" office:value="-13.9794000867204">
                <text:p>-13.97940008672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7.2$Windows_X86_64 LibreOffice_project/5cbfd1ab6520636bb5f7b99185aa69bd7456825d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3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13pt" style:font-size-complex="13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39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6.677cm" svg:y="0.275cm" chart:style-name="ch2">
          <text:p><text:span text:style-name="T1">DOE Vary Qstd</text:span></text:p>
        </chart:title>
        <chart:legend chart:legend-position="end" svg:x="13.025cm" svg:y="3.694cm" style:legend-expansion="high" chart:style-name="ch3"/>
        <chart:plot-area chart:style-name="ch4" svg:x="0.32cm" svg:y="1.301cm" svg:width="12.385cm" svg:height="6.548cm">
          <chart:coordinate-region svg:x="1.592cm" svg:y="1.503cm" svg:width="9.962cm" svg:height="6.144cm"/>
          <chart:axis chart:dimension="x" chart:name="primary-x" chart:style-name="ch5">
            <chart:title svg:x="6.119cm" svg:y="8.029cm" chart:style-name="ch6">
              <text:p><text:span text:style-name="T2">Qstd</text:span></text:p>
            </chart:title>
          </chart:axis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'Round 1'.E2:'Round 1'.E6" chart:label-cell-address="'Round 1'.E1:'Round 1'.E1" chart:class="chart:scatter">
            <chart:domain table:cell-range-address="'Round 1'.A2:'Round 1'.A6"/>
            <chart:data-point chart:repeated="5"/>
          </chart:series>
          <chart:series chart:attached-axis="primary-y" chart:style-name="ch11" chart:values-cell-range-address="'Round 1'.H2:'Round 1'.H6" chart:label-cell-address="'Round 1'.H1:'Round 1'.H1" chart:class="chart:scatter">
            <chart:data-point chart:repeated="5"/>
          </chart:series>
          <chart:series chart:attached-axis="primary-y" chart:style-name="ch12" chart:values-cell-range-address="'Round 1'.K2:'Round 1'.K6" chart:label-cell-address="'Round 1'.K1:'Round 1'.K1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au, s</text:p>
                <draw:g>
                  <svg:desc>'Round 1'.E1:'Round 1'.E1</svg:desc>
                </draw:g>
              </table:table-cell>
              <table:table-cell office:value-type="string">
                <text:p>Atten Von, dB</text:p>
                <draw:g>
                  <svg:desc>'Round 1'.H1:'Round 1'.H1</svg:desc>
                </draw:g>
              </table:table-cell>
              <table:table-cell office:value-type="string">
                <text:p>Atten Voa, dB</text:p>
                <draw:g>
                  <svg:desc>'Round 1'.K1:'Round 1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">
                <text:p>0.015</text:p>
                <draw:g>
                  <svg:desc>'Round 1'.A2:'Round 1'.A6</svg:desc>
                </draw:g>
              </table:table-cell>
              <table:table-cell office:value-type="float" office:value="0.144686311901723">
                <text:p>0.144686311901723</text:p>
                <draw:g>
                  <svg:desc>'Round 1'.E2:'Round 1'.E6</svg:desc>
                </draw:g>
              </table:table-cell>
              <table:table-cell office:value-type="float" office:value="-15.9176003468815">
                <text:p>-15.9176003468815</text:p>
                <draw:g>
                  <svg:desc>'Round 1'.H2:'Round 1'.H6</svg:desc>
                </draw:g>
              </table:table-cell>
              <table:table-cell office:value-type="float" office:value="-18.4163750790475">
                <text:p>-18.4163750790475</text:p>
                <draw:g>
                  <svg:desc>'Round 1'.K2:'Round 1'.K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">
                <text:p>0.03</text:p>
              </table:table-cell>
              <table:table-cell office:value-type="float" office:value="0.0936205547599384">
                <text:p>0.0936205547599384</text:p>
              </table:table-cell>
              <table:table-cell office:value-type="float" office:value="-10.4575749056068">
                <text:p>-10.4575749056068</text:p>
              </table:table-cell>
              <table:table-cell office:value-type="float" office:value="-10.4575749056068">
                <text:p>-10.45757490560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5">
                <text:p>0.0075</text:p>
              </table:table-cell>
              <table:table-cell office:value-type="float" office:value="0.180857889877154">
                <text:p>0.180857889877154</text:p>
              </table:table-cell>
              <table:table-cell office:value-type="float" office:value="-13.9794000867204">
                <text:p>-13.9794000867204</text:p>
              </table:table-cell>
              <table:table-cell office:value-type="float" office:value="-23.0980391997149">
                <text:p>-23.0980391997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">
                <text:p>0.015</text:p>
              </table:table-cell>
              <table:table-cell office:value-type="float" office:value="0.198943678864869">
                <text:p>0.198943678864869</text:p>
              </table:table-cell>
              <table:table-cell office:value-type="float" office:value="-20">
                <text:p>-20</text:p>
              </table:table-cell>
              <table:table-cell office:value-type="float" office:value="-19.1721462968355">
                <text:p>-19.1721462968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5">
                <text:p>0.015</text:p>
              </table:table-cell>
              <table:table-cell office:value-type="float" office:value="0.0982437920320342">
                <text:p>0.0982437920320342</text:p>
              </table:table-cell>
              <table:table-cell office:value-type="float" office:value="-13.1515463835559">
                <text:p>-13.1515463835559</text:p>
              </table:table-cell>
              <table:table-cell office:value-type="float" office:value="-13.9794000867204">
                <text:p>-13.97940008672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7.2$Windows_X86_64 LibreOffice_project/5cbfd1ab6520636bb5f7b99185aa69bd7456825d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2">
      <number:number number:decimal-places="2" number:min-decimal-places="2" number:min-integer-digits="1"/>
    </number:number-style>
    <number:number-style style:name="N13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39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39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39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4.185cm" svg:y="0.316cm" chart:style-name="ch2">
          <text:p><text:span text:style-name="T1">DOE Correlation - There's No Magic</text:span></text:p>
        </chart:title>
        <chart:legend chart:legend-position="end" svg:x="13.025cm" svg:y="3.946cm" style:legend-expansion="high" chart:style-name="ch3"/>
        <chart:plot-area chart:style-name="ch4" svg:x="1.321cm" svg:y="1.301cm" svg:width="11.384cm" svg:height="6.548cm">
          <chart:coordinate-region svg:x="2.593cm" svg:y="1.503cm" svg:width="9.66cm" svg:height="6.145cm"/>
          <chart:axis chart:dimension="x" chart:name="primary-x" chart:style-name="ch5">
            <chart:title svg:x="6.515cm" svg:y="8.029cm" chart:style-name="ch2">
              <text:p><text:span text:style-name="T2">Tau, s</text:span></text:p>
            </chart:title>
          </chart:axis>
          <chart:axis chart:dimension="y" chart:name="primary-y" chart:style-name="ch6">
            <chart:title svg:x="0.451cm" svg:y="5.285cm" chart:style-name="ch7">
              <text:p><text:span text:style-name="T2">Atten, dB</text:span></text:p>
            </chart:title>
            <chart:grid chart:style-name="ch8" chart:class="major"/>
          </chart:axis>
          <chart:series chart:style-name="ch9" chart:values-cell-range-address="'Round 1'.H2:'Round 1'.H6" chart:label-cell-address="'Round 1'.H1:'Round 1'.H1" chart:class="chart:scatter">
            <chart:domain table:cell-range-address="'Round 1'.E2:'Round 1'.E6"/>
            <chart:data-point chart:repeated="5"/>
          </chart:series>
          <chart:series chart:style-name="ch10" chart:values-cell-range-address="'Round 1'.K2:'Round 1'.K6" chart:label-cell-address="'Round 1'.K1:'Round 1'.K1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tten Von, dB</text:p>
                <draw:g>
                  <svg:desc>'Round 1'.H1:'Round 1'.H1</svg:desc>
                </draw:g>
              </table:table-cell>
              <table:table-cell office:value-type="string">
                <text:p>Atten Voa, dB</text:p>
                <draw:g>
                  <svg:desc>'Round 1'.K1:'Round 1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4686311901723">
                <text:p>0.144686311901723</text:p>
                <draw:g>
                  <svg:desc>'Round 1'.E2:'Round 1'.E6</svg:desc>
                </draw:g>
              </table:table-cell>
              <table:table-cell office:value-type="float" office:value="-15.9176003468815">
                <text:p>-15.9176003468815</text:p>
                <draw:g>
                  <svg:desc>'Round 1'.H2:'Round 1'.H6</svg:desc>
                </draw:g>
              </table:table-cell>
              <table:table-cell office:value-type="float" office:value="-18.4163750790475">
                <text:p>-18.4163750790475</text:p>
                <draw:g>
                  <svg:desc>'Round 1'.K2:'Round 1'.K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36205547599384">
                <text:p>0.0936205547599384</text:p>
              </table:table-cell>
              <table:table-cell office:value-type="float" office:value="-10.4575749056068">
                <text:p>-10.4575749056068</text:p>
              </table:table-cell>
              <table:table-cell office:value-type="float" office:value="-10.4575749056068">
                <text:p>-10.45757490560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0857889877154">
                <text:p>0.180857889877154</text:p>
              </table:table-cell>
              <table:table-cell office:value-type="float" office:value="-13.9794000867204">
                <text:p>-13.9794000867204</text:p>
              </table:table-cell>
              <table:table-cell office:value-type="float" office:value="-23.0980391997149">
                <text:p>-23.0980391997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8943678864869">
                <text:p>0.198943678864869</text:p>
              </table:table-cell>
              <table:table-cell office:value-type="float" office:value="-20">
                <text:p>-20</text:p>
              </table:table-cell>
              <table:table-cell office:value-type="float" office:value="-19.1721462968355">
                <text:p>-19.1721462968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82437920320342">
                <text:p>0.0982437920320342</text:p>
              </table:table-cell>
              <table:table-cell office:value-type="float" office:value="-13.1515463835559">
                <text:p>-13.1515463835559</text:p>
              </table:table-cell>
              <table:table-cell office:value-type="float" office:value="-13.9794000867204">
                <text:p>-13.97940008672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7.2$Windows_X86_64 LibreOffice_project/5cbfd1ab6520636bb5f7b99185aa69bd7456825d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3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13pt" style:font-size-complex="13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39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6.677cm" svg:y="0.276cm" chart:style-name="ch2">
          <text:p><text:span text:style-name="T1">DOE Vary Qstd</text:span></text:p>
        </chart:title>
        <chart:legend chart:legend-position="end" svg:x="13.025cm" svg:y="3.694cm" style:legend-expansion="high" chart:style-name="ch3"/>
        <chart:plot-area chart:style-name="ch4" svg:x="0.32cm" svg:y="1.301cm" svg:width="12.385cm" svg:height="6.548cm">
          <chart:coordinate-region svg:x="1.592cm" svg:y="1.503cm" svg:width="9.962cm" svg:height="6.144cm"/>
          <chart:axis chart:dimension="x" chart:name="primary-x" chart:style-name="ch5">
            <chart:title svg:x="6.119cm" svg:y="8.029cm" chart:style-name="ch6">
              <text:p><text:span text:style-name="T2">Qstd</text:span></text:p>
            </chart:title>
          </chart:axis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'Round 1_2'.E2:'Round 1_2'.E6" chart:label-cell-address="'Round 1_2'.E1:'Round 1_2'.E1" chart:class="chart:scatter">
            <chart:domain table:cell-range-address="'Round 1_2'.A2:'Round 1_2'.A6"/>
            <chart:data-point chart:repeated="5"/>
          </chart:series>
          <chart:series chart:attached-axis="primary-y" chart:style-name="ch11" chart:values-cell-range-address="'Round 1_2'.H2:'Round 1_2'.H6" chart:label-cell-address="'Round 1_2'.H1:'Round 1_2'.H1" chart:class="chart:scatter">
            <chart:data-point chart:repeated="5"/>
          </chart:series>
          <chart:series chart:attached-axis="primary-y" chart:style-name="ch12" chart:values-cell-range-address="'Round 1_2'.K2:'Round 1_2'.K6" chart:label-cell-address="'Round 1_2'.K1:'Round 1_2'.K1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au, s</text:p>
                <draw:g>
                  <svg:desc>'Round 1_2'.E1:'Round 1_2'.E1</svg:desc>
                </draw:g>
              </table:table-cell>
              <table:table-cell office:value-type="string">
                <text:p>Atten Von, dB</text:p>
                <draw:g>
                  <svg:desc>'Round 1_2'.H1:'Round 1_2'.H1</svg:desc>
                </draw:g>
              </table:table-cell>
              <table:table-cell office:value-type="string">
                <text:p>Atten Voa, dB</text:p>
                <draw:g>
                  <svg:desc>'Round 1_2'.K1:'Round 1_2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">
                <text:p>0.015</text:p>
                <draw:g>
                  <svg:desc>'Round 1_2'.A2:'Round 1_2'.A6</svg:desc>
                </draw:g>
              </table:table-cell>
              <table:table-cell office:value-type="float" office:value="0.0982437920320342">
                <text:p>0.0982437920320342</text:p>
                <draw:g>
                  <svg:desc>'Round 1_2'.E2:'Round 1_2'.E6</svg:desc>
                </draw:g>
              </table:table-cell>
              <table:table-cell office:value-type="float" office:value="-13.1515463835559">
                <text:p>-13.1515463835559</text:p>
                <draw:g>
                  <svg:desc>'Round 1_2'.H2:'Round 1_2'.H6</svg:desc>
                </draw:g>
              </table:table-cell>
              <table:table-cell office:value-type="float" office:value="-13.9794000867204">
                <text:p>-13.9794000867204</text:p>
                <draw:g>
                  <svg:desc>'Round 1_2'.K2:'Round 1_2'.K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">
                <text:p>0.03</text:p>
              </table:table-cell>
              <table:table-cell office:value-type="float" office:value="0.0691978013443023">
                <text:p>0.0691978013443023</text:p>
              </table:table-cell>
              <table:table-cell office:value-type="float" office:value="-10.4575749056068">
                <text:p>-10.4575749056068</text:p>
              </table:table-cell>
              <table:table-cell office:value-type="float" office:value="-14.8945498979339">
                <text:p>-14.89454989793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5">
                <text:p>0.0075</text:p>
              </table:table-cell>
              <table:table-cell office:value-type="float" office:value="0.121957810798387">
                <text:p>0.121957810798387</text:p>
              </table:table-cell>
              <table:table-cell office:value-type="float" office:value="-17.0774392864352">
                <text:p>-17.0774392864352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">
                <text:p>0.015</text:p>
              </table:table-cell>
              <table:table-cell office:value-type="float" office:value="0.144686311901723">
                <text:p>0.144686311901723</text:p>
              </table:table-cell>
              <table:table-cell office:value-type="float" office:value="-15.9176003468815">
                <text:p>-15.9176003468815</text:p>
              </table:table-cell>
              <table:table-cell office:value-type="float" office:value="-18.4163750790475">
                <text:p>-18.4163750790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5">
                <text:p>0.015</text:p>
              </table:table-cell>
              <table:table-cell office:value-type="float" office:value="0.0657665054098741">
                <text:p>0.0657665054098741</text:p>
              </table:table-cell>
              <table:table-cell office:value-type="float" office:value="-10.4575749056068">
                <text:p>-10.4575749056068</text:p>
              </table:table-cell>
              <table:table-cell office:value-type="float" office:value="-13.1515463835559">
                <text:p>-13.15154638355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7.2$Windows_X86_64 LibreOffice_project/5cbfd1ab6520636bb5f7b99185aa69bd7456825d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3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9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ffff00" draw:fill-color="#ffff00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up" chart:symbol-width="0.25cm" chart:symbol-height="0.25cm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00a933" draw:fill-color="#00a933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6.636cm" svg:y="0.316cm" chart:style-name="ch2">
          <text:p><text:span text:style-name="T1">DOE Vary R</text:span></text:p>
        </chart:title>
        <chart:legend chart:legend-position="end" svg:x="13.025cm" svg:y="3.694cm" style:legend-expansion="high" chart:style-name="ch3"/>
        <chart:plot-area chart:style-name="ch4" svg:x="0.32cm" svg:y="1.301cm" svg:width="12.385cm" svg:height="6.548cm">
          <chart:coordinate-region svg:x="1.591cm" svg:y="1.503cm" svg:width="9.962cm" svg:height="6.144cm"/>
          <chart:axis chart:dimension="x" chart:name="primary-x" chart:style-name="ch5">
            <chart:title svg:x="6.34cm" svg:y="8.029cm" chart:style-name="ch2">
              <text:p><text:span text:style-name="T2">R</text:span></text:p>
            </chart:title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'Round 1_2'.E2:'Round 1_2'.E6" chart:label-cell-address="'Round 1_2'.E1:'Round 1_2'.E1" chart:class="chart:scatter">
            <chart:domain table:cell-range-address="'Round 1_2'.B2:'Round 1_2'.B6"/>
            <chart:data-point chart:repeated="5"/>
          </chart:series>
          <chart:series chart:attached-axis="primary-y" chart:style-name="ch10" chart:values-cell-range-address="'Round 1_2'.H2:'Round 1_2'.H6" chart:label-cell-address="'Round 1_2'.H1:'Round 1_2'.H1" chart:class="chart:scatter">
            <chart:data-point chart:style-name="ch11"/>
            <chart:data-point chart:repeated="4"/>
          </chart:series>
          <chart:series chart:attached-axis="primary-y" chart:style-name="ch12" chart:values-cell-range-address="'Round 1_2'.K2:'Round 1_2'.K6" chart:label-cell-address="'Round 1_2'.K1:'Round 1_2'.K1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au, s</text:p>
                <draw:g>
                  <svg:desc>'Round 1_2'.E1:'Round 1_2'.E1</svg:desc>
                </draw:g>
              </table:table-cell>
              <table:table-cell office:value-type="string">
                <text:p>Atten Von, dB</text:p>
                <draw:g>
                  <svg:desc>'Round 1_2'.H1:'Round 1_2'.H1</svg:desc>
                </draw:g>
              </table:table-cell>
              <table:table-cell office:value-type="string">
                <text:p>Atten Voa, dB</text:p>
                <draw:g>
                  <svg:desc>'Round 1_2'.K1:'Round 1_2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5">
                <text:p>0.0005</text:p>
                <draw:g>
                  <svg:desc>'Round 1_2'.B2:'Round 1_2'.B6</svg:desc>
                </draw:g>
              </table:table-cell>
              <table:table-cell office:value-type="float" office:value="0.0982437920320342">
                <text:p>0.0982437920320342</text:p>
                <draw:g>
                  <svg:desc>'Round 1_2'.E2:'Round 1_2'.E6</svg:desc>
                </draw:g>
              </table:table-cell>
              <table:table-cell office:value-type="float" office:value="-13.1515463835559">
                <text:p>-13.1515463835559</text:p>
                <draw:g>
                  <svg:desc>'Round 1_2'.H2:'Round 1_2'.H6</svg:desc>
                </draw:g>
              </table:table-cell>
              <table:table-cell office:value-type="float" office:value="-13.9794000867204">
                <text:p>-13.9794000867204</text:p>
                <draw:g>
                  <svg:desc>'Round 1_2'.K2:'Round 1_2'.K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5">
                <text:p>0.0005</text:p>
              </table:table-cell>
              <table:table-cell office:value-type="float" office:value="0.0691978013443023">
                <text:p>0.0691978013443023</text:p>
              </table:table-cell>
              <table:table-cell office:value-type="float" office:value="-10.4575749056068">
                <text:p>-10.4575749056068</text:p>
              </table:table-cell>
              <table:table-cell office:value-type="float" office:value="-14.8945498979339">
                <text:p>-14.89454989793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5">
                <text:p>0.0005</text:p>
              </table:table-cell>
              <table:table-cell office:value-type="float" office:value="0.121957810798387">
                <text:p>0.121957810798387</text:p>
              </table:table-cell>
              <table:table-cell office:value-type="float" office:value="-17.0774392864352">
                <text:p>-17.0774392864352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">
                <text:p>0.001</text:p>
              </table:table-cell>
              <table:table-cell office:value-type="float" office:value="0.144686311901723">
                <text:p>0.144686311901723</text:p>
              </table:table-cell>
              <table:table-cell office:value-type="float" office:value="-15.9176003468815">
                <text:p>-15.9176003468815</text:p>
              </table:table-cell>
              <table:table-cell office:value-type="float" office:value="-18.4163750790475">
                <text:p>-18.4163750790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25">
                <text:p>0.00025</text:p>
              </table:table-cell>
              <table:table-cell office:value-type="float" office:value="0.0657665054098741">
                <text:p>0.0657665054098741</text:p>
              </table:table-cell>
              <table:table-cell office:value-type="float" office:value="-10.4575749056068">
                <text:p>-10.4575749056068</text:p>
              </table:table-cell>
              <table:table-cell office:value-type="float" office:value="-13.1515463835559">
                <text:p>-13.151546383555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7.2$Windows_X86_64 LibreOffice_project/5cbfd1ab6520636bb5f7b99185aa69bd7456825d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2">
      <number:number number:decimal-places="2" number:min-decimal-places="2" number:min-integer-digits="1"/>
    </number:number-style>
    <number:number-style style:name="N13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39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39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39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4.185cm" svg:y="0.316cm" chart:style-name="ch2">
          <text:p><text:span text:style-name="T1">DOE Correlation - There's No Magic</text:span></text:p>
        </chart:title>
        <chart:legend chart:legend-position="end" svg:x="13.025cm" svg:y="3.946cm" style:legend-expansion="high" chart:style-name="ch3"/>
        <chart:plot-area chart:style-name="ch4" svg:x="1.321cm" svg:y="1.301cm" svg:width="11.384cm" svg:height="6.548cm">
          <chart:coordinate-region svg:x="2.592cm" svg:y="1.503cm" svg:width="9.662cm" svg:height="6.145cm"/>
          <chart:axis chart:dimension="x" chart:name="primary-x" chart:style-name="ch5">
            <chart:title svg:x="6.515cm" svg:y="8.029cm" chart:style-name="ch2">
              <text:p><text:span text:style-name="T2">Tau, s</text:span></text:p>
            </chart:title>
          </chart:axis>
          <chart:axis chart:dimension="y" chart:name="primary-y" chart:style-name="ch6">
            <chart:title svg:x="0.451cm" svg:y="5.285cm" chart:style-name="ch7">
              <text:p><text:span text:style-name="T2">Atten, dB</text:span></text:p>
            </chart:title>
            <chart:grid chart:style-name="ch8" chart:class="major"/>
          </chart:axis>
          <chart:series chart:style-name="ch9" chart:values-cell-range-address="'Round 1_2'.H2:'Round 1_2'.H6" chart:label-cell-address="'Round 1_2'.H1:'Round 1_2'.H1" chart:class="chart:scatter">
            <chart:domain table:cell-range-address="'Round 1_2'.E2:'Round 1_2'.E6"/>
            <chart:data-point chart:repeated="5"/>
          </chart:series>
          <chart:series chart:style-name="ch10" chart:values-cell-range-address="'Round 1_2'.K2:'Round 1_2'.K6" chart:label-cell-address="'Round 1_2'.K1:'Round 1_2'.K1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tten Von, dB</text:p>
                <draw:g>
                  <svg:desc>'Round 1_2'.H1:'Round 1_2'.H1</svg:desc>
                </draw:g>
              </table:table-cell>
              <table:table-cell office:value-type="string">
                <text:p>Atten Voa, dB</text:p>
                <draw:g>
                  <svg:desc>'Round 1_2'.K1:'Round 1_2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82437920320342">
                <text:p>0.0982437920320342</text:p>
                <draw:g>
                  <svg:desc>'Round 1_2'.E2:'Round 1_2'.E6</svg:desc>
                </draw:g>
              </table:table-cell>
              <table:table-cell office:value-type="float" office:value="-13.1515463835559">
                <text:p>-13.1515463835559</text:p>
                <draw:g>
                  <svg:desc>'Round 1_2'.H2:'Round 1_2'.H6</svg:desc>
                </draw:g>
              </table:table-cell>
              <table:table-cell office:value-type="float" office:value="-13.9794000867204">
                <text:p>-13.9794000867204</text:p>
                <draw:g>
                  <svg:desc>'Round 1_2'.K2:'Round 1_2'.K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91978013443023">
                <text:p>0.0691978013443023</text:p>
              </table:table-cell>
              <table:table-cell office:value-type="float" office:value="-10.4575749056068">
                <text:p>-10.4575749056068</text:p>
              </table:table-cell>
              <table:table-cell office:value-type="float" office:value="-14.8945498979339">
                <text:p>-14.89454989793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1957810798387">
                <text:p>0.121957810798387</text:p>
              </table:table-cell>
              <table:table-cell office:value-type="float" office:value="-17.0774392864352">
                <text:p>-17.0774392864352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4686311901723">
                <text:p>0.144686311901723</text:p>
              </table:table-cell>
              <table:table-cell office:value-type="float" office:value="-15.9176003468815">
                <text:p>-15.9176003468815</text:p>
              </table:table-cell>
              <table:table-cell office:value-type="float" office:value="-18.4163750790475">
                <text:p>-18.4163750790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57665054098741">
                <text:p>0.0657665054098741</text:p>
              </table:table-cell>
              <table:table-cell office:value-type="float" office:value="-10.4575749056068">
                <text:p>-10.4575749056068</text:p>
              </table:table-cell>
              <table:table-cell office:value-type="float" office:value="-13.1515463835559">
                <text:p>-13.15154638355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7.2$Windows_X86_64 LibreOffice_project/5cbfd1ab6520636bb5f7b99185aa69bd7456825d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