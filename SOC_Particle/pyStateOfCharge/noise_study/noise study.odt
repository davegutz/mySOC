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2582755A933.png" manifest:media-type="image/png"/>
  <manifest:file-entry manifest:full-path="Pictures/10000001000003E80000025899209AA4.png" manifest:media-type="image/png"/>
  <manifest:file-entry manifest:full-path="Pictures/10000001000003E80000025821BC9598.png" manifest:media-type="image/png"/>
  <manifest:file-entry manifest:full-path="Pictures/10000001000003E8000002581ACD4B85.png" manifest:media-type="image/png"/>
  <manifest:file-entry manifest:full-path="Pictures/10000001000003E80000025848983A16.png" manifest:media-type="image/png"/>
  <manifest:file-entry manifest:full-path="Pictures/10000001000003E800000258671C3ED3.png" manifest:media-type="image/png"/>
  <manifest:file-entry manifest:full-path="Pictures/10000001000003E8000002581D5F6846.png" manifest:media-type="image/png"/>
  <manifest:file-entry manifest:full-path="Pictures/10000001000003E800000258EBB3898D.png" manifest:media-type="image/png"/>
  <manifest:file-entry manifest:full-path="Pictures/10000001000003E800000258B90982C8.png" manifest:media-type="image/png"/>
  <manifest:file-entry manifest:full-path="Pictures/10000001000003E800000258713268EA.png" manifest:media-type="image/png"/>
  <manifest:file-entry manifest:full-path="Pictures/10000001000003E800000258C0BFDD5B.png" manifest:media-type="image/png"/>
  <manifest:file-entry manifest:full-path="Pictures/10000001000003E8000002583DA3A8B4.png" manifest:media-type="image/png"/>
  <manifest:file-entry manifest:full-path="Pictures/10000001000003E800000258CA752488.png" manifest:media-type="image/png"/>
  <manifest:file-entry manifest:full-path="Pictures/10000001000003E8000002583D02976C.png" manifest:media-type="image/png"/>
  <manifest:file-entry manifest:full-path="Pictures/10000001000003E800000258D094D94F.png" manifest:media-type="image/png"/>
  <manifest:file-entry manifest:full-path="Pictures/10000001000003E800000258211384AC.png" manifest:media-type="image/png"/>
  <manifest:file-entry manifest:full-path="Pictures/10000001000003E800000258035ADBC0.png" manifest:media-type="image/png"/>
  <manifest:file-entry manifest:full-path="Pictures/10000001000003E80000025807AD4AF1.png" manifest:media-type="image/png"/>
  <manifest:file-entry manifest:full-path="Pictures/10000001000003E8000002589732680B.png" manifest:media-type="image/png"/>
  <manifest:file-entry manifest:full-path="Pictures/10000001000003E80000025882AC962D.png" manifest:media-type="image/png"/>
  <manifest:file-entry manifest:full-path="Pictures/10000001000003E8000002581B978913.png" manifest:media-type="image/png"/>
  <manifest:file-entry manifest:full-path="Pictures/10000001000003E8000002582CC394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2952e" officeooo:paragraph-rsid="0022952e"/>
    </style:style>
    <style:style style:name="P2" style:family="paragraph" style:parent-style-name="Standard" style:list-style-name="L1">
      <style:text-properties officeooo:paragraph-rsid="0022952e"/>
    </style:style>
    <style:style style:name="P3" style:family="paragraph" style:parent-style-name="Standard" style:list-style-name="L2">
      <style:text-properties officeooo:rsid="0022952e" officeooo:paragraph-rsid="0022952e"/>
    </style:style>
    <style:style style:name="P4" style:family="paragraph" style:parent-style-name="Standard" style:list-style-name="L2">
      <style:text-properties officeooo:paragraph-rsid="0022952e"/>
    </style:style>
    <style:style style:name="P5" style:family="paragraph" style:parent-style-name="Standard" style:list-style-name="L2">
      <style:text-properties officeooo:rsid="0022a14f" officeooo:paragraph-rsid="0022a14f"/>
    </style:style>
    <style:style style:name="P6" style:family="paragraph" style:parent-style-name="Standard" style:list-style-name="L2">
      <style:text-properties officeooo:rsid="0023e5bd" officeooo:paragraph-rsid="0023e5bd"/>
    </style:style>
    <style:style style:name="P7" style:family="paragraph" style:parent-style-name="Standard" style:list-style-name="L2">
      <style:text-properties officeooo:rsid="00252d8d" officeooo:paragraph-rsid="00252d8d"/>
    </style:style>
    <style:style style:name="P8" style:family="paragraph" style:parent-style-name="Standard">
      <style:text-properties officeooo:rsid="0023e5bd" officeooo:paragraph-rsid="0023e5bd"/>
    </style:style>
    <style:style style:name="P9" style:family="paragraph" style:parent-style-name="Standard">
      <style:paragraph-properties fo:break-before="page"/>
    </style:style>
    <style:style style:name="T1" style:family="text">
      <style:text-properties officeooo:rsid="0022952e"/>
    </style:style>
    <style:style style:name="T2" style:family="text">
      <style:text-properties officeooo:rsid="0022a1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n sample collection on app (CxX where X is number of data points)</text:p>
      <text:list text:style-name="L1">
        <text:list-item>
          <text:p text:style-name="P2"><text:span text:style-name="T1">used 2000 </text:span><text:span text:style-name="T2">points</text:span><text:span text:style-name="T1"> at first</text:span></text:p>
        </text:list-item>
      </text:list>
      <text:list text:style-name="L2">
        <text:list-item>
          <text:p text:style-name="P3">the 20000 unsure of aliasing</text:p>
        </text:list-item>
        <text:list-item>
          <text:p text:style-name="P4"><text:span text:style-name="T1">finally saw harmonics decreasing on run of only Vc</text:span><text:span text:style-name="T2">a</text:span><text:span text:style-name="T1"> in amplitude from <text:s/>1.6 to 4.7 ...23.4 in 3.1 Hz intervals. <text:s/>This was way below Nyquist of </text:span><text:span text:style-name="T2">92.5</text:span><text:span text:style-name="T1"> Hz so knew I could run at 100 Hz </text:span><text:span text:style-name="T2">for Nyquist of ~50 and add more data.</text:span></text:p>
        </text:list-item>
        <text:list-item>
          <text:p text:style-name="P5">20000 points (‘Cx20000’) because only 2 minutes to run with abundant fidelity. <text:s/></text:p>
        </text:list-item>
        <text:list-item>
          <text:p text:style-name="P6">There is clear 1.5 Hz noise on ADC signals. <text:s/>I observed it on Vb too though didn’t save that data</text:p>
        </text:list-item>
        <text:list-item>
          <text:p text:style-name="P7">N=200 and N=2000 poor data quality</text:p>
        </text:list-item>
        <text:list-item>
          <text:p text:style-name="P7">N=20000 is required</text:p>
        </text:list-item>
      </text:list>
      <text:p text:style-name="P8">Removed Bluetooth module and signals much cleaner especially Vr. <text:s/>BT probably pinging for connection every 0.66 seconds or so.</text:p>
      <text:p text:style-name="P9"><draw:frame draw:style-name="fr1" draw:name="Image2" text:anchor-type="char" svg:x="0.0555in" svg:y="2.6571in" svg:width="6.9252in" svg:height="4.1547in" draw:z-index="11"><draw:image xlink:href="Pictures/10000001000003E80000025821BC9598.png" xlink:type="simple" xlink:show="embed" xlink:actuate="onLoad" draw:mime-type="image/png"/></draw:frame><draw:frame draw:style-name="fr1" draw:name="Image1" text:anchor-type="char" svg:x="0.0555in" svg:y="-0.7555in" svg:width="6.9252in" svg:height="4.1547in" draw:z-index="10"><draw:image xlink:href="Pictures/10000001000003E80000025821BC9598.png" xlink:type="simple" xlink:show="embed" xlink:actuate="onLoad" draw:mime-type="image/png"/></draw:frame><draw:frame draw:style-name="fr1" draw:name="Image19" text:anchor-type="char" svg:x="0.111in" svg:y="6.0575in" svg:width="6.9252in" svg:height="4.1547in" draw:z-index="12"><draw:image xlink:href="Pictures/10000001000003E80000025848983A16.png" xlink:type="simple" xlink:show="embed" xlink:actuate="onLoad" draw:mime-type="image/png"/></draw:frame></text:p>
      <text:p text:style-name="P9"><draw:frame draw:style-name="fr1" draw:name="Image17" text:anchor-type="char" svg:x="0.111in" svg:y="-0.7665in" svg:width="6.9252in" svg:height="4.1547in" draw:z-index="8"><draw:image xlink:href="Pictures/10000001000003E8000002581D5F6846.png" xlink:type="simple" xlink:show="embed" xlink:actuate="onLoad" draw:mime-type="image/png"/></draw:frame><draw:frame draw:style-name="fr1" draw:name="Image18" text:anchor-type="char" svg:x="0.0799in" svg:y="2.822in" svg:width="6.9252in" svg:height="4.1547in" draw:z-index="9"><draw:image xlink:href="Pictures/10000001000003E800000258671C3ED3.png" xlink:type="simple" xlink:show="embed" xlink:actuate="onLoad" draw:mime-type="image/png"/></draw:frame><draw:frame draw:style-name="fr1" draw:name="Image20" text:anchor-type="char" svg:x="0.0311in" svg:y="6.0575in" svg:width="6.9252in" svg:height="4.1547in" draw:z-index="13"><draw:image xlink:href="Pictures/10000001000003E800000258713268EA.png" xlink:type="simple" xlink:show="embed" xlink:actuate="onLoad" draw:mime-type="image/png"/></draw:frame></text:p>
      <text:p text:style-name="P9"><draw:frame draw:style-name="fr1" draw:name="Image3" text:anchor-type="char" svg:x="0.0575in" svg:y="2.2575in" svg:width="6.9252in" svg:height="4.1547in" draw:z-index="14"><draw:image xlink:href="Pictures/10000001000003E800000258EBB3898D.png" xlink:type="simple" xlink:show="embed" xlink:actuate="onLoad" draw:mime-type="image/png"/></draw:frame><draw:frame draw:style-name="fr1" draw:name="Image4" text:anchor-type="char" svg:x="0.0209in" svg:y="-0.7874in" svg:width="6.9252in" svg:height="4.1547in" draw:z-index="0"><draw:image xlink:href="Pictures/10000001000003E800000258C0BFDD5B.png" xlink:type="simple" xlink:show="embed" xlink:actuate="onLoad" draw:mime-type="image/png"/></draw:frame><draw:frame draw:style-name="fr1" draw:name="Image21" text:anchor-type="char" svg:x="0.0575in" svg:y="5.6937in" svg:width="6.9252in" svg:height="4.1547in" draw:z-index="15"><draw:image xlink:href="Pictures/10000001000003E8000002582755A933.png" xlink:type="simple" xlink:show="embed" xlink:actuate="onLoad" draw:mime-type="image/png"/></draw:frame></text:p>
      <text:p text:style-name="P9"><draw:frame draw:style-name="fr1" draw:name="Image5" text:anchor-type="char" svg:x="0.0866in" svg:y="2.0882in" svg:width="6.9252in" svg:height="4.1547in" draw:z-index="17"><draw:image xlink:href="Pictures/10000001000003E80000025899209AA4.png" xlink:type="simple" xlink:show="embed" xlink:actuate="onLoad" draw:mime-type="image/png"/></draw:frame><draw:frame draw:style-name="fr1" draw:name="Image22" text:anchor-type="char" svg:x="0.1602in" svg:y="5.4016in" svg:width="6.9252in" svg:height="4.1547in" draw:z-index="16"><draw:image xlink:href="Pictures/10000001000003E80000025899209AA4.png" xlink:type="simple" xlink:show="embed" xlink:actuate="onLoad" draw:mime-type="image/png"/></draw:frame><draw:frame draw:style-name="fr1" draw:name="Image6" text:anchor-type="char" svg:x="0.0264in" svg:y="-0.7874in" svg:width="6.9252in" svg:height="4.1547in" draw:z-index="1"><draw:image xlink:href="Pictures/10000001000003E800000258CA752488.png" xlink:type="simple" xlink:show="embed" xlink:actuate="onLoad" draw:mime-type="image/png"/></draw:frame></text:p>
      <text:p text:style-name="P9"><draw:frame draw:style-name="fr1" draw:name="Image7" text:anchor-type="char" svg:x="-0.0957in" svg:y="2.5374in" svg:width="6.9252in" svg:height="4.1547in" draw:z-index="18"><draw:image xlink:href="Pictures/10000001000003E800000258B90982C8.png" xlink:type="simple" xlink:show="embed" xlink:actuate="onLoad" draw:mime-type="image/png"/></draw:frame><draw:frame draw:style-name="fr1" draw:name="Image8" text:anchor-type="char" svg:x="-0.0484in" svg:y="-0.7874in" svg:width="6.9252in" svg:height="4.1547in" draw:z-index="2"><draw:image xlink:href="Pictures/10000001000003E8000002583D02976C.png" xlink:type="simple" xlink:show="embed" xlink:actuate="onLoad" draw:mime-type="image/png"/></draw:frame><draw:frame draw:style-name="fr1" draw:name="Image23" text:anchor-type="char" svg:x="0in" svg:y="5.9063in" svg:width="6.9252in" svg:height="4.1547in" draw:z-index="19"><draw:image xlink:href="Pictures/10000001000003E800000258D094D94F.png" xlink:type="simple" xlink:show="embed" xlink:actuate="onLoad" draw:mime-type="image/png"/></draw:frame></text:p>
      <text:p text:style-name="P9"><draw:frame draw:style-name="fr1" draw:name="Image9" text:anchor-type="char" svg:x="0.0402in" svg:y="2.6035in" svg:width="6.4008in" svg:height="3.8402in" draw:z-index="20"><draw:image xlink:href="Pictures/10000001000003E8000002583DA3A8B4.png" xlink:type="simple" xlink:show="embed" xlink:actuate="onLoad" draw:mime-type="image/png"/></draw:frame><draw:frame draw:style-name="fr1" draw:name="Image10" text:anchor-type="char" svg:x="0.0402in" svg:y="-0.7874in" svg:width="6.1783in" svg:height="3.7071in" draw:z-index="3"><draw:image xlink:href="Pictures/10000001000003E800000258211384AC.png" xlink:type="simple" xlink:show="embed" xlink:actuate="onLoad" draw:mime-type="image/png"/></draw:frame><draw:frame draw:style-name="fr1" draw:name="Image24" text:anchor-type="char" svg:x="0in" svg:y="6.052in" svg:width="6.4965in" svg:height="3.898in" draw:z-index="21"><draw:image xlink:href="Pictures/10000001000003E800000258035ADBC0.png" xlink:type="simple" xlink:show="embed" xlink:actuate="onLoad" draw:mime-type="image/png"/></draw:frame></text:p>
      <text:p text:style-name="P9"><draw:frame draw:style-name="fr1" draw:name="Image11" text:anchor-type="char" svg:x="0in" svg:y="1.8626in" svg:width="6.9252in" svg:height="4.1547in" draw:z-index="4"><draw:image xlink:href="Pictures/10000001000003E80000025807AD4AF1.png" xlink:type="simple" xlink:show="embed" xlink:actuate="onLoad" draw:mime-type="image/png"/></draw:frame><draw:frame draw:style-name="fr1" draw:name="Image12" text:anchor-type="char" svg:x="0.0665in" svg:y="-0.7874in" svg:width="6.9252in" svg:height="4.1547in" draw:z-index="5"><draw:image xlink:href="Pictures/10000001000003E8000002589732680B.png" xlink:type="simple" xlink:show="embed" xlink:actuate="onLoad" draw:mime-type="image/png"/></draw:frame><draw:frame draw:style-name="fr1" draw:name="Image25" text:anchor-type="char" svg:x="0in" svg:y="6.0575in" svg:width="6.9252in" svg:height="4.1547in" draw:z-index="22"><draw:image xlink:href="Pictures/10000001000003E8000002581ACD4B85.png" xlink:type="simple" xlink:show="embed" xlink:actuate="onLoad" draw:mime-type="image/png"/></draw:frame></text:p>
      <text:p text:style-name="P9"><draw:frame draw:style-name="fr1" draw:name="Image13" text:anchor-type="char" svg:x="0in" svg:y="1.8516in" svg:width="6.9252in" svg:height="4.1547in" draw:z-index="6"><draw:image xlink:href="Pictures/10000001000003E80000025882AC962D.png" xlink:type="simple" xlink:show="embed" xlink:actuate="onLoad" draw:mime-type="image/png"/></draw:frame><draw:frame draw:style-name="fr1" draw:name="Image14" text:anchor-type="char" svg:x="0.1in" svg:y="-0.7874in" svg:width="6.9252in" svg:height="4.1547in" draw:z-index="7"><draw:image xlink:href="Pictures/10000001000003E8000002581B978913.png" xlink:type="simple" xlink:show="embed" xlink:actuate="onLoad" draw:mime-type="image/png"/></draw:frame><draw:frame draw:style-name="fr1" draw:name="Image26" text:anchor-type="char" svg:x="0in" svg:y="6.0575in" svg:width="6.9252in" svg:height="4.1547in" draw:z-index="23"><draw:image xlink:href="Pictures/10000001000003E8000002582CC394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11:38:03.240896700</meta:creation-date>
    <dc:date>2025-12-06T12:39:14.463452600</dc:date>
    <meta:editing-duration>PT40M18S</meta:editing-duration>
    <meta:editing-cycles>10</meta:editing-cycles>
    <meta:generator>LibreOffice/25.2.7.2$Windows_X86_64 LibreOffice_project/5cbfd1ab6520636bb5f7b99185aa69bd7456825d</meta:generator>
    <meta:document-statistic meta:table-count="0" meta:image-count="24" meta:object-count="0" meta:page-count="9" meta:paragraph-count="9" meta:word-count="134" meta:character-count="700" meta:non-whitespace-character-count="576"/>
  </office:meta>
</office:document-meta>
</file>