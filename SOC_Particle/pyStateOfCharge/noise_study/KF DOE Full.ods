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22000002AF48534BCD.png" manifest:media-type="image/png"/>
  <manifest:file-entry manifest:full-path="Pictures/1000000000000322000002AF681BC41C.png" manifest:media-type="image/png"/>
  <manifest:file-entry manifest:full-path="Pictures/1000000000000322000002AFA5AAABE0.png" manifest:media-type="image/png"/>
  <manifest:file-entry manifest:full-path="Pictures/1000000000000322000002AF9F2821D9.png" manifest:media-type="image/png"/>
  <manifest:file-entry manifest:full-path="Pictures/1000000000000322000002AF821B2491.png" manifest:media-type="image/png"/>
  <manifest:file-entry manifest:full-path="Pictures/1000000000000322000002AF10B06813.png" manifest:media-type="image/png"/>
  <manifest:file-entry manifest:full-path="Pictures/1000000000000322000002AF2379A322.png" manifest:media-type="image/png"/>
  <manifest:file-entry manifest:full-path="Pictures/1000000000000322000002AF640F2A9D.png" manifest:media-type="image/png"/>
  <manifest:file-entry manifest:full-path="Pictures/1000000000000322000002AFE2218EBA.png" manifest:media-type="image/png"/>
  <manifest:file-entry manifest:full-path="Pictures/1000000000000322000002AFE262D6B2.png" manifest:media-type="image/png"/>
  <manifest:file-entry manifest:full-path="Pictures/1000000000000322000002AFEB00A97E.png" manifest:media-type="image/png"/>
  <manifest:file-entry manifest:full-path="Pictures/1000000000000322000002AFF46FB488.png" manifest:media-type="image/png"/>
  <manifest:file-entry manifest:full-path="Pictures/1000000000000322000002AFF5851D7F.png" manifest:media-type="image/png"/>
  <manifest:file-entry manifest:full-path="Pictures/1000000000000322000002AF46D21F4D.png" manifest:media-type="image/png"/>
  <manifest:file-entry manifest:full-path="Pictures/1000000000000322000002AF2DCB97A3.png" manifest:media-type="image/png"/>
  <manifest:file-entry manifest:full-path="Pictures/1000000000000322000002AFCE36B27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291in"/>
    </style:style>
    <style:style style:name="co2" style:family="table-column">
      <style:table-column-properties fo:break-before="auto" style:column-width="0.6047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1.0646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0.679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701in" fo:break-before="auto" style:use-optimal-row-height="true"/>
    </style:style>
    <style:style style:name="ro3" style:family="table-row">
      <style:table-row-properties style:row-height="0.5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00a933"/>
    </style:style>
    <style:style style:name="ce4" style:family="table-cell" style:parent-style-name="Default">
      <style:text-properties fo:font-size="28pt" fo:font-weight="bold" style:font-size-asian="28pt" style:font-weight-asian="bold" style:font-size-complex="28pt" style:font-weight-complex="bold"/>
    </style:style>
    <style:style style:name="ce5" style:family="table-cell" style:parent-style-name="Default">
      <style:table-cell-properties fo:background-color="#81d41a"/>
      <style:text-properties fo:font-size="28pt" fo:font-weight="bold" style:font-size-asian="28pt" style:font-weight-asian="bold" style:font-size-complex="28pt" style:font-weight-complex="bold"/>
    </style:style>
    <style:style style:name="ce6" style:family="table-cell" style:parent-style-name="Default">
      <style:text-properties fo:font-size="32pt" fo:font-weight="bold" style:font-size-asian="32pt" style:font-weight-asian="bold" style:font-size-complex="32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style:writing-mode="lr-tb"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KF1x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number-columns-repeated="6"/>
        <table:table-row table:style-name="ro1">
          <table:table-cell office:value-type="string" calcext:value-type="string">
            <text:p>Qstd</text:p>
          </table:table-cell>
          <table:table-cell office:value-type="string" calcext:value-type="string">
            <text:p><text:s/>R</text:p>
          </table:table-cell>
          <table:table-cell office:value-type="string" calcext:value-type="string">
            <text:p><text:s/>lpf_tau</text:p>
          </table:table-cell>
          <table:table-cell office:value-type="string" calcext:value-type="string">
            <text:p><text:s/>attenuation_lpf</text:p>
          </table:table-cell>
          <table:table-cell/>
          <table:table-cell office:value-type="string" calcext:value-type="string">
            <text:p><text:s/>tau_3db</text:p>
          </table:table-cell>
          <table:table-cell office:value-type="string" calcext:value-type="string">
            <text:p><text:s/>tau_45</text:p>
          </table:table-cell>
          <table:table-cell>
            <draw:frame draw:z-index="6" draw:style-name="gr1" draw:text-style-name="P2" svg:width="7.8976in" svg:height="5.278in" svg:x="0.7748in" svg:y="0in">
              <draw:object draw:notify-on-update-of-ranges="'lpf_tau 0.1'.D2:'lpf_tau 0.1'.D11 'lpf_tau 0.1'.F1:'lpf_tau 0.1'.F1 'lpf_tau 0.1'.F2:'lpf_tau 0.1'.F11 'lpf_tau 0'.D2:'lpf_tau 0'.D11 'lpf_tau 0'.F1:'lpf_tau 0'.F1 'lpf_tau 0'.F2:'lpf_tau 0'.F11 'Lag only'.D2:'Lag only'.D5 'Lag only'.F1:'Lag only'.F1 'Lag only'.F2:'Lag only'.F5" xlink:href="./Object 1" xlink:type="simple" xlink:show="embed" xlink:actuate="onLoad">
                <loext:p text:style-name="P1">0.1 s pure lag is optimal</loext:p>
              </draw:object>
              <draw:image xlink:href="./ObjectReplacements/Object 1" xlink:type="simple" xlink:show="embed" xlink:actuate="onLoad"/>
            </draw:frame>
          </table:table-cell>
          <table:table-cell table:style-name="Default" table:number-columns-repeated="6"/>
        </table:table-row>
        <table:table-row table:style-name="ro1">
          <table:table-cell table:style-name="ce1" office:value-type="float" office:value="0.015" calcext:value-type="float">
            <text:p>0.015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00001" calcext:value-type="float">
            <text:p>0.00001</text:p>
          </table:table-cell>
          <table:table-cell table:style-name="ce1" office:value-type="float" office:value="0.602256" calcext:value-type="float">
            <text:p>0.602256</text:p>
          </table:table-cell>
          <table:table-cell table:style-name="ce1"/>
          <table:table-cell table:style-name="ce1" office:value-type="float" office:value="0.165183" calcext:value-type="float">
            <text:p>0.165183</text:p>
          </table:table-cell>
          <table:table-cell table:style-name="ce1" office:value-type="float" office:value="0.204541" calcext:value-type="float">
            <text:p>0.204541</text:p>
          </table:table-cell>
          <table:table-cell office:value-type="string" calcext:value-type="string">
            <text:p>Fig 1 </text:p>
          </table:table-cell>
          <table:table-cell table:style-name="Default" table:number-columns-repeated="6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601113" calcext:value-type="float">
            <text:p>0.601113</text:p>
          </table:table-cell>
          <table:table-cell/>
          <table:table-cell office:value-type="float" office:value="0.122664" calcext:value-type="float">
            <text:p>0.122664</text:p>
          </table:table-cell>
          <table:table-cell office:value-type="float" office:value="0.144996" calcext:value-type="float">
            <text:p>0.144996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60248" calcext:value-type="float">
            <text:p>0.60248</text:p>
          </table:table-cell>
          <table:table-cell/>
          <table:table-cell office:value-type="float" office:value="0.229459" calcext:value-type="float">
            <text:p>0.229459</text:p>
          </table:table-cell>
          <table:table-cell office:value-type="float" office:value="0.270918" calcext:value-type="float">
            <text:p>0.270918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602473" calcext:value-type="float">
            <text:p>0.602473</text:p>
          </table:table-cell>
          <table:table-cell/>
          <table:table-cell office:value-type="float" office:value="0.229459" calcext:value-type="float">
            <text:p>0.229459</text:p>
          </table:table-cell>
          <table:table-cell office:value-type="float" office:value="0.270918" calcext:value-type="float">
            <text:p>0.270918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601114" calcext:value-type="float">
            <text:p>0.601114</text:p>
          </table:table-cell>
          <table:table-cell/>
          <table:table-cell office:value-type="float" office:value="0.122664" calcext:value-type="float">
            <text:p>0.122664</text:p>
          </table:table-cell>
          <table:table-cell office:value-type="float" office:value="0.144996" calcext:value-type="float">
            <text:p>0.144996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601114" calcext:value-type="float">
            <text:p>0.601114</text:p>
          </table:table-cell>
          <table:table-cell/>
          <table:table-cell office:value-type="float" office:value="0.122664" calcext:value-type="float">
            <text:p>0.122664</text:p>
          </table:table-cell>
          <table:table-cell office:value-type="float" office:value="0.144996" calcext:value-type="float">
            <text:p>0.144996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669507" calcext:value-type="float">
            <text:p>0.669507</text:p>
          </table:table-cell>
          <table:table-cell/>
          <table:table-cell office:value-type="float" office:value="0.08406" calcext:value-type="float">
            <text:p>0.08406</text:p>
          </table:table-cell>
          <table:table-cell office:value-type="float" office:value="0.099915" calcext:value-type="float">
            <text:p>0.099915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602257" calcext:value-type="float">
            <text:p>0.602257</text:p>
          </table:table-cell>
          <table:table-cell/>
          <table:table-cell office:value-type="float" office:value="0.165183" calcext:value-type="float">
            <text:p>0.165183</text:p>
          </table:table-cell>
          <table:table-cell office:value-type="float" office:value="0.204541" calcext:value-type="float">
            <text:p>0.204541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602255" calcext:value-type="float">
            <text:p>0.602255</text:p>
          </table:table-cell>
          <table:table-cell/>
          <table:table-cell office:value-type="float" office:value="0.165183" calcext:value-type="float">
            <text:p>0.165183</text:p>
          </table:table-cell>
          <table:table-cell office:value-type="float" office:value="0.204541" calcext:value-type="float">
            <text:p>0.204541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669507" calcext:value-type="float">
            <text:p>0.669507</text:p>
          </table:table-cell>
          <table:table-cell/>
          <table:table-cell office:value-type="float" office:value="0.08406" calcext:value-type="float">
            <text:p>0.08406</text:p>
          </table:table-cell>
          <table:table-cell office:value-type="float" office:value="0.099915" calcext:value-type="float">
            <text:p>0.099915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0.494699" calcext:value-type="float">
            <text:p>0.494699</text:p>
          </table:table-cell>
          <table:table-cell/>
          <table:table-cell table:number-columns-repeated="2" office:value-type="float" office:value="0.270918" calcext:value-type="float">
            <text:p>0.270918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0.489864" calcext:value-type="float">
            <text:p>0.489864</text:p>
          </table:table-cell>
          <table:table-cell/>
          <table:table-cell office:value-type="float" office:value="0.144996" calcext:value-type="float">
            <text:p>0.144996</text:p>
          </table:table-cell>
          <table:table-cell office:value-type="float" office:value="0.244308" calcext:value-type="float">
            <text:p>0.244308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0.497395" calcext:value-type="float">
            <text:p>0.497395</text:p>
          </table:table-cell>
          <table:table-cell/>
          <table:table-cell table:number-columns-repeated="2" office:value-type="float" office:value="0.270918" calcext:value-type="float">
            <text:p>0.270918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02" calcext:value-type="float">
            <text:p>0.002</text:p>
          </table:table-cell>
          <table:table-cell office:value-type="float" office:value="0.1" calcext:value-type="float">
            <text:p>0.1</text:p>
          </table:table-cell>
          <table:table-cell office:value-type="float" office:value="0.497393" calcext:value-type="float">
            <text:p>0.497393</text:p>
          </table:table-cell>
          <table:table-cell/>
          <table:table-cell table:number-columns-repeated="2" office:value-type="float" office:value="0.270918" calcext:value-type="float">
            <text:p>0.270918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1" calcext:value-type="float">
            <text:p>0.1</text:p>
          </table:table-cell>
          <table:table-cell office:value-type="float" office:value="0.489865" calcext:value-type="float">
            <text:p>0.489865</text:p>
          </table:table-cell>
          <table:table-cell/>
          <table:table-cell office:value-type="float" office:value="0.144996" calcext:value-type="float">
            <text:p>0.144996</text:p>
          </table:table-cell>
          <table:table-cell office:value-type="float" office:value="0.244308" calcext:value-type="float">
            <text:p>0.244308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1" calcext:value-type="float">
            <text:p>0.1</text:p>
          </table:table-cell>
          <table:table-cell office:value-type="float" office:value="0.489865" calcext:value-type="float">
            <text:p>0.489865</text:p>
          </table:table-cell>
          <table:table-cell/>
          <table:table-cell office:value-type="float" office:value="0.144996" calcext:value-type="float">
            <text:p>0.144996</text:p>
          </table:table-cell>
          <table:table-cell office:value-type="float" office:value="0.244308" calcext:value-type="float">
            <text:p>0.244308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1" calcext:value-type="float">
            <text:p>0.1</text:p>
          </table:table-cell>
          <table:table-cell office:value-type="float" office:value="0.499648" calcext:value-type="float">
            <text:p>0.499648</text:p>
          </table:table-cell>
          <table:table-cell/>
          <table:table-cell office:value-type="float" office:value="0.10574" calcext:value-type="float">
            <text:p>0.10574</text:p>
          </table:table-cell>
          <table:table-cell office:value-type="float" office:value="0.177427" calcext:value-type="float">
            <text:p>0.177427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1" calcext:value-type="float">
            <text:p>0.1</text:p>
          </table:table-cell>
          <table:table-cell office:value-type="float" office:value="0.494699" calcext:value-type="float">
            <text:p>0.494699</text:p>
          </table:table-cell>
          <table:table-cell/>
          <table:table-cell table:number-columns-repeated="2" office:value-type="float" office:value="0.270918" calcext:value-type="float">
            <text:p>0.270918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0.494699" calcext:value-type="float">
            <text:p>0.494699</text:p>
          </table:table-cell>
          <table:table-cell/>
          <table:table-cell table:number-columns-repeated="2" office:value-type="float" office:value="0.270918" calcext:value-type="float">
            <text:p>0.270918</text:p>
          </table:table-cell>
          <table:table-cell/>
          <table:table-cell table:style-name="Default" table:number-columns-repeated="6"/>
        </table:table-row>
        <table:table-row table:style-name="ro1">
          <table:table-cell table:style-name="ce1" office:value-type="float" office:value="0.015" calcext:value-type="float">
            <text:p>0.015</text:p>
          </table:table-cell>
          <table:table-cell table:style-name="ce1" office:value-type="float" office:value="0.00025" calcext:value-type="float">
            <text:p>0.00025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499648" calcext:value-type="float">
            <text:p>0.499648</text:p>
          </table:table-cell>
          <table:table-cell table:style-name="ce1"/>
          <table:table-cell table:style-name="ce1" office:value-type="float" office:value="0.10574" calcext:value-type="float">
            <text:p>0.10574</text:p>
          </table:table-cell>
          <table:table-cell table:style-name="ce1" office:value-type="float" office:value="0.177427" calcext:value-type="float">
            <text:p>0.177427</text:p>
          </table:table-cell>
          <table:table-cell office:value-type="string" calcext:value-type="string">
            <text:p>Fig 20</text:p>
          </table:table-cell>
          <table:table-cell table:style-name="Default" table:number-columns-repeated="6"/>
        </table:table-row>
        <table:table-row table:style-name="ro1">
          <table:table-cell office:value-type="float" office:value="1.5" calcext:value-type="float">
            <text:p>1.5</text:p>
          </table:table-cell>
          <table:table-cell table:number-columns-repeated="2" office:value-type="float" office:value="0.00001" calcext:value-type="float">
            <text:p>0.00001</text:p>
          </table:table-cell>
          <table:table-cell office:value-type="float" office:value="1.353256" calcext:value-type="float">
            <text:p>1.353256</text:p>
          </table:table-cell>
          <table:table-cell/>
          <table:table-cell office:value-type="float" office:value="0.157445" calcext:value-type="float">
            <text:p>0.157445</text:p>
          </table:table-cell>
          <table:table-cell office:value-type="float" office:value="0.229459" calcext:value-type="float">
            <text:p>0.229459</text:p>
          </table:table-cell>
          <table:table-cell/>
          <table:table-cell table:style-name="Default" table:number-columns-repeated="6"/>
        </table:table-row>
        <table:table-row table:style-name="ro1"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0.00001" calcext:value-type="float">
            <text:p>0.00001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582069" calcext:value-type="float">
            <text:p>0.582069</text:p>
          </table:table-cell>
          <table:table-cell table:style-name="ce2"/>
          <table:table-cell table:style-name="ce2" office:value-type="float" office:value="0.049928" calcext:value-type="float">
            <text:p>0.049928</text:p>
          </table:table-cell>
          <table:table-cell table:style-name="ce2" office:value-type="float" office:value="0.0464" calcext:value-type="float">
            <text:p>0.0464</text:p>
          </table:table-cell>
          <table:table-cell/>
          <table:table-cell table:style-name="Default" table:number-columns-repeated="6"/>
        </table:table-row>
        <table:table-row table:style-name="ro1"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.00001" calcext:value-type="float">
            <text:p>0.00001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482389" calcext:value-type="float">
            <text:p>0.482389</text:p>
          </table:table-cell>
          <table:table-cell table:style-name="ce1"/>
          <table:table-cell table:style-name="ce1" office:value-type="float" office:value="0.100957" calcext:value-type="float">
            <text:p>0.100957</text:p>
          </table:table-cell>
          <table:table-cell table:style-name="ce1" office:value-type="float" office:value="0.099915" calcext:value-type="float">
            <text:p>0.099915</text:p>
          </table:table-cell>
          <table:table-cell office:value-type="string" calcext:value-type="string">
            <text:p>Fig 23</text:p>
          </table:table-cell>
          <table:table-cell table:style-name="Default" table:number-columns-repeated="6"/>
        </table:table-row>
        <table:table-row table:style-name="ro1"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0.00001" calcext:value-type="float">
            <text:p>0.00001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0.439789" calcext:value-type="float">
            <text:p>0.439789</text:p>
          </table:table-cell>
          <table:table-cell table:style-name="ce2"/>
          <table:table-cell table:style-name="ce2" office:value-type="float" office:value="0.157445" calcext:value-type="float">
            <text:p>0.157445</text:p>
          </table:table-cell>
          <table:table-cell table:style-name="ce2" office:value-type="float" office:value="0.154962" calcext:value-type="float">
            <text:p>0.154962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25" calcext:value-type="float">
            <text:p>0.25</text:p>
          </table:table-cell>
          <table:table-cell office:value-type="float" office:value="0.380744" calcext:value-type="float">
            <text:p>0.380744</text:p>
          </table:table-cell>
          <table:table-cell/>
          <table:table-cell table:number-columns-repeated="2" office:value-type="float" office:value="0.270918" calcext:value-type="float">
            <text:p>0.270918</text:p>
          </table:table-cell>
          <table:table-cell/>
          <table:table-cell table:style-name="Default" table:number-columns-repeated="6"/>
        </table:table-row>
        <table:table-row table:style-name="ro1">
          <table:table-cell table:number-columns-repeated="8"/>
          <table:table-cell table:style-name="Default" table:number-columns-repeated="6"/>
        </table:table-row>
        <table:table-row table:style-name="ro1">
          <table:table-cell>
            <draw:frame draw:z-index="0" draw:name="Image 1" draw:style-name="gr2" draw:text-style-name="P2" svg:width="5.3071in" svg:height="4.5878in" svg:x="0.0028in" svg:y="0.0256in">
              <draw:image xlink:href="Pictures/1000000000000322000002AF48534BCD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>
            <draw:frame draw:z-index="1" draw:name="Image 2" draw:style-name="gr2" draw:text-style-name="P2" svg:width="5.3331in" svg:height="4.6102in" svg:x="0.311in" svg:y="0.0331in">
              <draw:image xlink:href="Pictures/1000000000000322000002AFA5AAABE0.png" xlink:type="simple" xlink:show="embed" xlink:actuate="onLoad" draw:mime-type="image/png">
                <text:p/>
              </draw:image>
            </draw:frame>
          </table:table-cell>
          <table:table-cell table:style-name="Default" table:number-columns-repeated="4"/>
          <table:table-cell table:style-name="Default">
            <draw:frame draw:z-index="2" draw:name="Image 3" draw:style-name="gr2" draw:text-style-name="P2" svg:width="5.3921in" svg:height="4.6614in" svg:x="0.8311in" svg:y="0.0339in">
              <draw:image xlink:href="Pictures/1000000000000322000002AF681BC41C.png" xlink:type="simple" xlink:show="embed" xlink:actuate="onLoad" draw:mime-type="image/png">
                <text:p/>
              </draw:image>
            </draw:frame>
          </table:table-cell>
          <table:table-cell table:style-name="Default"/>
        </table:table-row>
        <table:table-row table:style-name="ro1" table:number-rows-repeated="24">
          <table:table-cell table:number-columns-repeated="8"/>
          <table:table-cell table:style-name="Default" table:number-columns-repeated="6"/>
        </table:table-row>
        <table:table-row table:style-name="ro1">
          <table:table-cell table:number-columns-repeated="7"/>
          <table:table-cell>
            <draw:frame draw:z-index="4" draw:name="Image 5" draw:style-name="gr2" draw:text-style-name="P2" svg:width="5.1909in" svg:height="4.4874in" svg:x="0.285in" svg:y="0.1181in">
              <draw:image xlink:href="Pictures/1000000000000322000002AF2379A322.png" xlink:type="simple" xlink:show="embed" xlink:actuate="onLoad" draw:mime-type="image/png">
                <text:p/>
              </draw:image>
            </draw:frame>
          </table:table-cell>
          <table:table-cell table:style-name="Default" table:number-columns-repeated="5"/>
          <table:table-cell table:style-name="Default">
            <draw:frame draw:z-index="5" draw:name="Image 6" draw:style-name="gr2" draw:text-style-name="P2" svg:width="5.048in" svg:height="4.3638in" svg:x="0.235in" svg:y="0.076in">
              <draw:image xlink:href="Pictures/1000000000000322000002AF10B06813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>
            <draw:frame draw:z-index="3" draw:name="Image 4" draw:style-name="gr2" draw:text-style-name="P2" svg:width="4.9665in" svg:height="4.2933in" svg:x="0.1035in" svg:y="0.0161in">
              <draw:image xlink:href="Pictures/1000000000000322000002AF640F2A9D.png" xlink:type="simple" xlink:show="embed" xlink:actuate="onLoad" draw:mime-type="image/png">
                <text:p/>
              </draw:image>
            </draw:frame>
          </table:table-cell>
          <table:table-cell table:number-columns-repeated="7"/>
          <table:table-cell table:style-name="Default" table:number-columns-repeated="6"/>
        </table:table-row>
      </table:table>
      <table:table table:name="lpf_tau 0.1" table:style-name="ta1">
        <table:shapes>
          <draw:frame draw:z-index="0" draw:style-name="gr1" draw:text-style-name="P2" svg:width="7.4047in" svg:height="5.2827in" svg:x="6.6504in" svg:y="0.6776in">
            <draw:object draw:notify-on-update-of-ranges="'lpf_tau 0.1'.D1:'lpf_tau 0.1'.D1 'lpf_tau 0.1'.D2:'lpf_tau 0.1'.D11 'lpf_tau 0.1'.F1:'lpf_tau 0.1'.F1 'lpf_tau 0.1'.F2:'lpf_tau 0.1'.F11 'lpf_tau 0'.F1:'lpf_tau 0'.F1 'lpf_tau 0'.F2:'lpf_tau 0'.F11 'lpf_tau 0'.D2:'lpf_tau 0'.D11 'Lag only'.F1:'Lag only'.F1 'Lag only'.F2:'Lag only'.F5 'Lag only'.D2:'Lag only'.D5" xlink:href="./Object 5" xlink:type="simple" xlink:show="embed" xlink:actuate="onLoad">
              <loext:p text:style-name="P1">0.1 s pure lag is optimal</loext:p>
            </draw:object>
            <draw:image xlink:href="./ObjectReplacements/Object 5" xlink:type="simple" xlink:show="embed" xlink:actuate="onLoad"/>
          </draw:frame>
        </table:shapes>
        <table:table-column table:style-name="co7" table:number-columns-repeated="8" table:default-cell-style-name="Default"/>
        <table:table-row table:style-name="ro1">
          <table:table-cell office:value-type="string" calcext:value-type="string">
            <text:p>Qstd</text:p>
          </table:table-cell>
          <table:table-cell office:value-type="string" calcext:value-type="string">
            <text:p><text:s/>R</text:p>
          </table:table-cell>
          <table:table-cell office:value-type="string" calcext:value-type="string">
            <text:p><text:s/>lpf_tau</text:p>
          </table:table-cell>
          <table:table-cell office:value-type="string" calcext:value-type="string">
            <text:p><text:s/>attenuation_lpf</text:p>
          </table:table-cell>
          <table:table-cell/>
          <table:table-cell office:value-type="string" calcext:value-type="string">
            <text:p><text:s/>tau_3db – tau 0.1</text:p>
          </table:table-cell>
          <table:table-cell office:value-type="string" calcext:value-type="string">
            <text:p><text:s/>tau_45</text:p>
          </table:table-cell>
          <table:table-cell/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0.494699" calcext:value-type="float">
            <text:p>0.494699</text:p>
          </table:table-cell>
          <table:table-cell/>
          <table:table-cell table:number-columns-repeated="2" office:value-type="float" office:value="0.270918" calcext:value-type="float">
            <text:p>0.270918</text:p>
          </table:table-cell>
          <table:table-cell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0.489864" calcext:value-type="float">
            <text:p>0.489864</text:p>
          </table:table-cell>
          <table:table-cell/>
          <table:table-cell office:value-type="float" office:value="0.144996" calcext:value-type="float">
            <text:p>0.144996</text:p>
          </table:table-cell>
          <table:table-cell office:value-type="float" office:value="0.244308" calcext:value-type="float">
            <text:p>0.244308</text:p>
          </table:table-cell>
          <table:table-cell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0.497395" calcext:value-type="float">
            <text:p>0.497395</text:p>
          </table:table-cell>
          <table:table-cell/>
          <table:table-cell table:number-columns-repeated="2" office:value-type="float" office:value="0.270918" calcext:value-type="float">
            <text:p>0.270918</text:p>
          </table:table-cell>
          <table:table-cell/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02" calcext:value-type="float">
            <text:p>0.002</text:p>
          </table:table-cell>
          <table:table-cell office:value-type="float" office:value="0.1" calcext:value-type="float">
            <text:p>0.1</text:p>
          </table:table-cell>
          <table:table-cell office:value-type="float" office:value="0.497393" calcext:value-type="float">
            <text:p>0.497393</text:p>
          </table:table-cell>
          <table:table-cell/>
          <table:table-cell table:number-columns-repeated="2" office:value-type="float" office:value="0.270918" calcext:value-type="float">
            <text:p>0.270918</text:p>
          </table:table-cell>
          <table:table-cell/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1" calcext:value-type="float">
            <text:p>0.1</text:p>
          </table:table-cell>
          <table:table-cell office:value-type="float" office:value="0.489865" calcext:value-type="float">
            <text:p>0.489865</text:p>
          </table:table-cell>
          <table:table-cell/>
          <table:table-cell office:value-type="float" office:value="0.144996" calcext:value-type="float">
            <text:p>0.144996</text:p>
          </table:table-cell>
          <table:table-cell office:value-type="float" office:value="0.244308" calcext:value-type="float">
            <text:p>0.244308</text:p>
          </table:table-cell>
          <table:table-cell/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1" calcext:value-type="float">
            <text:p>0.1</text:p>
          </table:table-cell>
          <table:table-cell office:value-type="float" office:value="0.489865" calcext:value-type="float">
            <text:p>0.489865</text:p>
          </table:table-cell>
          <table:table-cell/>
          <table:table-cell office:value-type="float" office:value="0.144996" calcext:value-type="float">
            <text:p>0.144996</text:p>
          </table:table-cell>
          <table:table-cell office:value-type="float" office:value="0.244308" calcext:value-type="float">
            <text:p>0.244308</text:p>
          </table:table-cell>
          <table:table-cell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1" calcext:value-type="float">
            <text:p>0.1</text:p>
          </table:table-cell>
          <table:table-cell office:value-type="float" office:value="0.499648" calcext:value-type="float">
            <text:p>0.499648</text:p>
          </table:table-cell>
          <table:table-cell/>
          <table:table-cell office:value-type="float" office:value="0.10574" calcext:value-type="float">
            <text:p>0.10574</text:p>
          </table:table-cell>
          <table:table-cell office:value-type="float" office:value="0.177427" calcext:value-type="float">
            <text:p>0.177427</text:p>
          </table:table-cell>
          <table:table-cell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1" calcext:value-type="float">
            <text:p>0.1</text:p>
          </table:table-cell>
          <table:table-cell office:value-type="float" office:value="0.494699" calcext:value-type="float">
            <text:p>0.494699</text:p>
          </table:table-cell>
          <table:table-cell/>
          <table:table-cell table:number-columns-repeated="2" office:value-type="float" office:value="0.270918" calcext:value-type="float">
            <text:p>0.270918</text:p>
          </table:table-cell>
          <table:table-cell/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0.494699" calcext:value-type="float">
            <text:p>0.494699</text:p>
          </table:table-cell>
          <table:table-cell/>
          <table:table-cell table:number-columns-repeated="2" office:value-type="float" office:value="0.270918" calcext:value-type="float">
            <text:p>0.270918</text:p>
          </table:table-cell>
          <table:table-cell/>
        </table:table-row>
        <table:table-row table:style-name="ro1">
          <table:table-cell table:style-name="ce1" office:value-type="float" office:value="0.015" calcext:value-type="float">
            <text:p>0.015</text:p>
          </table:table-cell>
          <table:table-cell table:style-name="ce1" office:value-type="float" office:value="0.00025" calcext:value-type="float">
            <text:p>0.00025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499648" calcext:value-type="float">
            <text:p>0.499648</text:p>
          </table:table-cell>
          <table:table-cell table:style-name="ce1"/>
          <table:table-cell table:style-name="ce1" office:value-type="float" office:value="0.10574" calcext:value-type="float">
            <text:p>0.10574</text:p>
          </table:table-cell>
          <table:table-cell table:style-name="ce1" office:value-type="float" office:value="0.177427" calcext:value-type="float">
            <text:p>0.177427</text:p>
          </table:table-cell>
          <table:table-cell office:value-type="string" calcext:value-type="string">
            <text:p>Fig 11</text:p>
          </table:table-cell>
        </table:table-row>
      </table:table>
      <table:table table:name="lpf_tau 0" table:style-name="ta1">
        <table:shapes>
          <draw:frame draw:z-index="0" draw:style-name="gr3" draw:text-style-name="P2" svg:width="6.2988in" svg:height="3.5429in" svg:x="6.9752in" svg:y="0.8264in">
            <draw:object draw:notify-on-update-of-ranges="'lpf_tau 0'.D2:'lpf_tau 0'.D11 'lpf_tau 0'.F1:'lpf_tau 0'.F1 'lpf_tau 0'.F2:'lpf_tau 0'.F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7" table:number-columns-repeated="7" table:default-cell-style-name="Default"/>
        <table:table-row table:style-name="ro1">
          <table:table-cell office:value-type="string" calcext:value-type="string">
            <text:p>Qstd</text:p>
          </table:table-cell>
          <table:table-cell office:value-type="string" calcext:value-type="string">
            <text:p><text:s/>R</text:p>
          </table:table-cell>
          <table:table-cell office:value-type="string" calcext:value-type="string">
            <text:p><text:s/>lpf_tau</text:p>
          </table:table-cell>
          <table:table-cell office:value-type="string" calcext:value-type="string">
            <text:p><text:s/>attenuation_lpf</text:p>
          </table:table-cell>
          <table:table-cell/>
          <table:table-cell office:value-type="string" calcext:value-type="string">
            <text:p><text:s/>tau_3db – tau 0</text:p>
          </table:table-cell>
          <table:table-cell office:value-type="string" calcext:value-type="string">
            <text:p><text:s/>tau_45</text:p>
          </table:table-cell>
        </table:table-row>
        <table:table-row table:style-name="ro1">
          <table:table-cell table:style-name="ce1" office:value-type="float" office:value="0.015" calcext:value-type="float">
            <text:p>0.015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00001" calcext:value-type="float">
            <text:p>0.00001</text:p>
          </table:table-cell>
          <table:table-cell table:style-name="ce1" office:value-type="float" office:value="0.602256" calcext:value-type="float">
            <text:p>0.602256</text:p>
          </table:table-cell>
          <table:table-cell table:style-name="ce1"/>
          <table:table-cell table:style-name="ce1" office:value-type="float" office:value="0.165183" calcext:value-type="float">
            <text:p>0.165183</text:p>
          </table:table-cell>
          <table:table-cell office:value-type="float" office:value="0.204541" calcext:value-type="float">
            <text:p>0.204541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601113" calcext:value-type="float">
            <text:p>0.601113</text:p>
          </table:table-cell>
          <table:table-cell/>
          <table:table-cell office:value-type="float" office:value="0.122664" calcext:value-type="float">
            <text:p>0.122664</text:p>
          </table:table-cell>
          <table:table-cell office:value-type="float" office:value="0.144996" calcext:value-type="float">
            <text:p>0.144996</text:p>
          </table:table-cell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60248" calcext:value-type="float">
            <text:p>0.60248</text:p>
          </table:table-cell>
          <table:table-cell/>
          <table:table-cell office:value-type="float" office:value="0.229459" calcext:value-type="float">
            <text:p>0.229459</text:p>
          </table:table-cell>
          <table:table-cell office:value-type="float" office:value="0.270918" calcext:value-type="float">
            <text:p>0.27091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602473" calcext:value-type="float">
            <text:p>0.602473</text:p>
          </table:table-cell>
          <table:table-cell/>
          <table:table-cell office:value-type="float" office:value="0.229459" calcext:value-type="float">
            <text:p>0.229459</text:p>
          </table:table-cell>
          <table:table-cell office:value-type="float" office:value="0.270918" calcext:value-type="float">
            <text:p>0.27091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601114" calcext:value-type="float">
            <text:p>0.601114</text:p>
          </table:table-cell>
          <table:table-cell/>
          <table:table-cell office:value-type="float" office:value="0.122664" calcext:value-type="float">
            <text:p>0.122664</text:p>
          </table:table-cell>
          <table:table-cell office:value-type="float" office:value="0.144996" calcext:value-type="float">
            <text:p>0.14499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601114" calcext:value-type="float">
            <text:p>0.601114</text:p>
          </table:table-cell>
          <table:table-cell/>
          <table:table-cell office:value-type="float" office:value="0.122664" calcext:value-type="float">
            <text:p>0.122664</text:p>
          </table:table-cell>
          <table:table-cell office:value-type="float" office:value="0.144996" calcext:value-type="float">
            <text:p>0.144996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669507" calcext:value-type="float">
            <text:p>0.669507</text:p>
          </table:table-cell>
          <table:table-cell/>
          <table:table-cell office:value-type="float" office:value="0.08406" calcext:value-type="float">
            <text:p>0.08406</text:p>
          </table:table-cell>
          <table:table-cell office:value-type="float" office:value="0.099915" calcext:value-type="float">
            <text:p>0.099915</text:p>
          </table:table-cell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602257" calcext:value-type="float">
            <text:p>0.602257</text:p>
          </table:table-cell>
          <table:table-cell/>
          <table:table-cell office:value-type="float" office:value="0.165183" calcext:value-type="float">
            <text:p>0.165183</text:p>
          </table:table-cell>
          <table:table-cell office:value-type="float" office:value="0.204541" calcext:value-type="float">
            <text:p>0.20454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602255" calcext:value-type="float">
            <text:p>0.602255</text:p>
          </table:table-cell>
          <table:table-cell/>
          <table:table-cell office:value-type="float" office:value="0.165183" calcext:value-type="float">
            <text:p>0.165183</text:p>
          </table:table-cell>
          <table:table-cell office:value-type="float" office:value="0.204541" calcext:value-type="float">
            <text:p>0.20454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669507" calcext:value-type="float">
            <text:p>0.669507</text:p>
          </table:table-cell>
          <table:table-cell/>
          <table:table-cell office:value-type="float" office:value="0.08406" calcext:value-type="float">
            <text:p>0.08406</text:p>
          </table:table-cell>
          <table:table-cell office:value-type="float" office:value="0.099915" calcext:value-type="float">
            <text:p>0.099915</text:p>
          </table:table-cell>
        </table:table-row>
      </table:table>
      <table:table table:name="Lag only" table:style-name="ta1">
        <table:shapes>
          <draw:frame draw:z-index="0" draw:style-name="gr3" draw:text-style-name="P2" svg:width="6.2988in" svg:height="3.5429in" svg:x="5.4488in" svg:y="0.7504in">
            <draw:object draw:notify-on-update-of-ranges="'Lag only'.D1:'Lag only'.D1 'Lag only'.D2:'Lag only'.D5 'Lag only'.F1:'Lag only'.F1 'Lag only'.F2:'Lag only'.F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7" table:number-columns-repeated="8" table:default-cell-style-name="Default"/>
        <table:table-row table:style-name="ro1">
          <table:table-cell office:value-type="string" calcext:value-type="string">
            <text:p>Qstd</text:p>
          </table:table-cell>
          <table:table-cell office:value-type="string" calcext:value-type="string">
            <text:p><text:s/>R</text:p>
          </table:table-cell>
          <table:table-cell office:value-type="string" calcext:value-type="string">
            <text:p><text:s/>lpf_tau</text:p>
          </table:table-cell>
          <table:table-cell office:value-type="string" calcext:value-type="string">
            <text:p><text:s/>attenuation_lpf</text:p>
          </table:table-cell>
          <table:table-cell/>
          <table:table-cell office:value-type="string" calcext:value-type="string">
            <text:p><text:s/>tau_3db – lag only</text:p>
          </table:table-cell>
          <table:table-cell office:value-type="string" calcext:value-type="string">
            <text:p><text:s/>tau_45</text:p>
          </table:table-cell>
          <table:table-cell/>
        </table:table-row>
        <table:table-row table:style-name="ro1"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0.00001" calcext:value-type="float">
            <text:p>0.00001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582069" calcext:value-type="float">
            <text:p>0.582069</text:p>
          </table:table-cell>
          <table:table-cell table:style-name="ce2"/>
          <table:table-cell table:style-name="ce2" office:value-type="float" office:value="0.049928" calcext:value-type="float">
            <text:p>0.049928</text:p>
          </table:table-cell>
          <table:table-cell table:style-name="ce2" office:value-type="float" office:value="0.0464" calcext:value-type="float">
            <text:p>0.0464</text:p>
          </table:table-cell>
          <table:table-cell/>
        </table:table-row>
        <table:table-row table:style-name="ro1"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0.00001" calcext:value-type="float">
            <text:p>0.00001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482389" calcext:value-type="float">
            <text:p>0.482389</text:p>
          </table:table-cell>
          <table:table-cell table:style-name="ce3"/>
          <table:table-cell table:style-name="ce3" office:value-type="float" office:value="0.100957" calcext:value-type="float">
            <text:p>0.100957</text:p>
          </table:table-cell>
          <table:table-cell table:style-name="ce3" office:value-type="float" office:value="0.099915" calcext:value-type="float">
            <text:p>0.099915</text:p>
          </table:table-cell>
          <table:table-cell office:value-type="string" calcext:value-type="string">
            <text:p>Fig 23</text:p>
          </table:table-cell>
        </table:table-row>
        <table:table-row table:style-name="ro1"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0.00001" calcext:value-type="float">
            <text:p>0.00001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0.439789" calcext:value-type="float">
            <text:p>0.439789</text:p>
          </table:table-cell>
          <table:table-cell table:style-name="ce2"/>
          <table:table-cell table:style-name="ce2" office:value-type="float" office:value="0.157445" calcext:value-type="float">
            <text:p>0.157445</text:p>
          </table:table-cell>
          <table:table-cell table:style-name="ce2" office:value-type="float" office:value="0.154962" calcext:value-type="float">
            <text:p>0.154962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25" calcext:value-type="float">
            <text:p>0.25</text:p>
          </table:table-cell>
          <table:table-cell office:value-type="float" office:value="0.380744" calcext:value-type="float">
            <text:p>0.380744</text:p>
          </table:table-cell>
          <table:table-cell/>
          <table:table-cell table:number-columns-repeated="2" office:value-type="float" office:value="0.270918" calcext:value-type="float">
            <text:p>0.270918</text:p>
          </table:table-cell>
          <table:table-cell/>
        </table:table-row>
      </table:table>
      <table:table table:name="Effect Cap on Atten" table:style-name="ta1">
        <table:table-column table:style-name="co7" table:number-columns-repeated="34" table:default-cell-style-name="Default"/>
        <table:table-row table:style-name="ro1">
          <table:table-cell>
            <draw:frame draw:z-index="0" draw:name="Image 8" draw:style-name="gr2" draw:text-style-name="P2" svg:width="6.7252in" svg:height="5.8154in" svg:x="0.326in" svg:y="0in">
              <draw:image xlink:href="Pictures/1000000000000322000002AFE2218EBA.png" xlink:type="simple" xlink:show="embed" xlink:actuate="onLoad" draw:mime-type="image/png">
                <text:p/>
              </draw:image>
            </draw:frame>
          </table:table-cell>
          <table:table-cell table:number-columns-repeated="33"/>
        </table:table-row>
        <table:table-row table:style-name="ro1">
          <table:table-cell table:number-columns-repeated="8"/>
          <table:table-cell>
            <draw:frame draw:z-index="1" draw:name="Image 7" draw:style-name="gr2" draw:text-style-name="P2" svg:width="6.7252in" svg:height="5.8154in" svg:x="0.326in" svg:y="0.0291in">
              <draw:image xlink:href="Pictures/1000000000000322000002AF821B2491.png" xlink:type="simple" xlink:show="embed" xlink:actuate="onLoad" draw:mime-type="image/png">
                <text:p/>
              </draw:image>
            </draw:frame>
          </table:table-cell>
          <table:table-cell table:number-columns-repeated="14"/>
          <table:table-cell>
            <draw:frame draw:z-index="3" draw:name="Image 10" draw:style-name="gr2" draw:text-style-name="P2" svg:width="6.7252in" svg:height="5.8154in" svg:x="0.3689in" svg:y="0.1067in">
              <draw:image xlink:href="Pictures/1000000000000322000002AF9F2821D9.png" xlink:type="simple" xlink:show="embed" xlink:actuate="onLoad" draw:mime-type="image/png">
                <text:p/>
              </draw:image>
            </draw:frame>
          </table:table-cell>
          <table:table-cell table:number-columns-repeated="7"/>
          <table:table-cell>
            <draw:frame draw:z-index="4" draw:name="Image 11" draw:style-name="gr2" draw:text-style-name="P2" svg:width="6.7248in" svg:height="5.8154in" svg:x="0.285in" svg:y="0in">
              <draw:image xlink:href="Pictures/1000000000000322000002AFE262D6B2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>
          <table:table-cell table:number-columns-repeated="16"/>
          <table:table-cell>
            <draw:frame draw:z-index="2" draw:name="Image 9" draw:style-name="gr2" draw:text-style-name="P2" svg:width="6.7252in" svg:height="5.8154in" svg:x="0.1189in" svg:y="0.0004in">
              <draw:image xlink:href="Pictures/1000000000000322000002AFEB00A97E.png" xlink:type="simple" xlink:show="embed" xlink:actuate="onLoad" draw:mime-type="image/png">
                <text:p/>
              </draw:image>
            </draw:frame>
          </table:table-cell>
          <table:table-cell table:number-columns-repeated="17"/>
        </table:table-row>
        <table:table-row table:style-name="ro1" table:number-rows-repeated="33">
          <table:table-cell table:number-columns-repeated="34"/>
        </table:table-row>
        <table:table-row table:style-name="ro2">
          <table:table-cell table:number-columns-repeated="2"/>
          <table:table-cell table:style-name="ce4" office:value-type="string" calcext:value-type="string">
            <text:p>0 uF 0.2 vpp</text:p>
          </table:table-cell>
          <table:table-cell table:number-columns-repeated="7"/>
          <table:table-cell table:style-name="ce4" office:value-type="string" calcext:value-type="string">
            <text:p>470 uF <text:s/>0.012 vpp</text:p>
          </table:table-cell>
          <table:table-cell table:number-columns-repeated="7"/>
          <table:table-cell table:style-name="ce4" office:value-type="string" calcext:value-type="string">
            <text:p>220 uF <text:s/>0.012 vpp</text:p>
          </table:table-cell>
          <table:table-cell table:number-columns-repeated="6"/>
          <table:table-cell table:style-name="ce5" office:value-type="string" calcext:value-type="string">
            <text:p>100 uF <text:s/>0.012 vpp (140 Hz = fs)</text:p>
          </table:table-cell>
          <table:table-cell table:style-name="ce1" table:number-columns-repeated="6"/>
          <table:table-cell/>
          <table:table-cell table:style-name="ce4" office:value-type="string" calcext:value-type="string">
            <text:p>47 uF <text:s/>0.016 vpp</text:p>
          </table:table-cell>
        </table:table-row>
        <table:table-row table:style-name="ro1">
          <table:table-cell table:number-columns-repeated="34"/>
        </table:table-row>
        <table:table-row table:style-name="ro1">
          <table:table-cell table:number-columns-repeated="25"/>
          <table:table-cell office:value-type="string" calcext:value-type="string">
            <text:p>140 Hz</text:p>
          </table:table-cell>
          <table:table-cell table:number-columns-repeated="8"/>
        </table:table-row>
      </table:table>
      <table:table table:name="Whole VoVc NoAmp" table:style-name="ta1">
        <table:table-column table:style-name="co7" table:number-columns-repeated="27" table:default-cell-style-name="Default"/>
        <table:table-row table:style-name="ro1" table:number-rows-repeated="21">
          <table:table-cell table:number-columns-repeated="27"/>
        </table:table-row>
        <table:table-row table:style-name="ro3">
          <table:table-cell table:number-columns-repeated="18"/>
          <table:table-cell table:style-name="ce6" office:value-type="string" calcext:value-type="string">
            <text:p>Ground</text:p>
          </table:table-cell>
          <table:table-cell table:number-columns-repeated="8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16"/>
          <table:table-cell>
            <draw:frame draw:z-index="3" draw:name="Image 12" draw:style-name="gr2" draw:text-style-name="P2" svg:width="6.7252in" svg:height="5.8154in" svg:x="0.5535in" svg:y="0in">
              <draw:image xlink:href="Pictures/1000000000000322000002AFF46FB488.png" xlink:type="simple" xlink:show="embed" xlink:actuate="onLoad" draw:mime-type="image/png">
                <text:p/>
              </draw:image>
            </draw:frame>
          </table:table-cell>
          <table:table-cell table:number-columns-repeated="10"/>
        </table:table-row>
        <table:table-row table:style-name="ro1" table:number-rows-repeated="9">
          <table:table-cell table:number-columns-repeated="27"/>
        </table:table-row>
        <table:table-row table:style-name="ro3">
          <table:table-cell table:number-columns-repeated="2"/>
          <table:table-cell table:style-name="ce4" office:value-type="string" calcext:value-type="string">
            <text:p>0 uF <text:s/>0.012 vpp</text:p>
          </table:table-cell>
          <table:table-cell table:number-columns-repeated="6"/>
          <table:table-cell table:style-name="ce4" office:value-type="string" calcext:value-type="string">
            <text:p>100 uF <text:s/>0.0012 vpp <text:s/>fs = 79 Hz</text:p>
          </table:table-cell>
          <table:table-cell table:number-columns-repeated="16"/>
          <table:table-cell table:style-name="ce6" office:value-type="string" calcext:value-type="string">
            <text:p>remove BT</text:p>
          </table:table-cell>
        </table:table-row>
        <table:table-row table:style-name="ro1" table:number-rows-repeated="8">
          <table:table-cell table:number-columns-repeated="27"/>
        </table:table-row>
        <table:table-row table:style-name="ro1">
          <table:table-cell>
            <draw:frame draw:z-index="1" draw:name="Image 17" draw:style-name="gr2" draw:text-style-name="P2" svg:width="6.7252in" svg:height="5.8154in" svg:x="0.0669in" svg:y="0.089in">
              <draw:image xlink:href="Pictures/1000000000000322000002AFF5851D7F.png" xlink:type="simple" xlink:show="embed" xlink:actuate="onLoad" draw:mime-type="image/png">
                <text:p/>
              </draw:image>
            </draw:frame>
          </table:table-cell>
          <table:table-cell table:number-columns-repeated="26"/>
        </table:table-row>
        <table:table-row table:style-name="ro1">
          <table:table-cell table:number-columns-repeated="8"/>
          <table:table-cell>
            <draw:frame draw:z-index="2" draw:name="Image 18" draw:style-name="gr2" draw:text-style-name="P2" svg:width="6.7252in" svg:height="5.8154in" svg:x="0.5031in" svg:y="0.0886in">
              <draw:image xlink:href="Pictures/1000000000000322000002AF46D21F4D.png" xlink:type="simple" xlink:show="embed" xlink:actuate="onLoad" draw:mime-type="image/png">
                <text:p/>
              </draw:image>
            </draw:frame>
          </table:table-cell>
          <table:table-cell table:number-columns-repeated="18"/>
        </table:table-row>
        <table:table-row table:style-name="ro1" table:number-rows-repeated="4">
          <table:table-cell table:number-columns-repeated="27"/>
        </table:table-row>
        <table:table-row table:style-name="ro1">
          <table:table-cell table:number-columns-repeated="25"/>
          <table:table-cell>
            <draw:frame draw:z-index="4" draw:name="Image 13" draw:style-name="gr2" draw:text-style-name="P2" svg:width="6.7252in" svg:height="5.8102in" svg:x="0.1508in" svg:y="0in">
              <draw:image xlink:href="Pictures/1000000000000322000002AF2DCB97A3.png" xlink:type="simple" xlink:show="embed" xlink:actuate="onLoad" draw:mime-type="image/png">
                <text:p/>
              </draw:image>
            </draw:frame>
          </table:table-cell>
          <table:table-cell/>
        </table:table-row>
        <table:table-row table:style-name="ro1" table:number-rows-repeated="4">
          <table:table-cell table:number-columns-repeated="27"/>
        </table:table-row>
        <table:table-row table:style-name="ro1">
          <table:table-cell table:number-columns-repeated="16"/>
          <table:table-cell>
            <draw:frame draw:z-index="0" draw:name="Image 16" draw:style-name="gr2" draw:text-style-name="P2" svg:width="6.7252in" svg:height="5.8154in" svg:x="0.6031in" svg:y="0.072in">
              <draw:image xlink:href="Pictures/1000000000000322000002AFCE36B27F.png" xlink:type="simple" xlink:show="embed" xlink:actuate="onLoad" draw:mime-type="image/png">
                <text:p/>
              </draw:image>
            </draw:frame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KF1x1.A1:KF1x1.G26">
          <table:filter>
            <table:filter-and>
              <table:filter-condition table:data-type="number" table:value="0.1" table:operator="=" table:field-number="2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2$Windows_X86_64 LibreOffice_project/5cbfd1ab6520636bb5f7b99185aa69bd7456825d</meta:generator>
    <dc:date>2025-12-15T11:16:57.897522200</dc:date>
    <meta:editing-duration>P3DT5H55M44S</meta:editing-duration>
    <meta:editing-cycles>18</meta:editing-cycles>
    <meta:document-statistic meta:table-count="6" meta:cell-count="333" meta:object-count="20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3pt" style:font-size-asian="13pt" style:font-size-complex="13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none" svg:stroke-width="0.08cm" svg:stroke-color="#ff8000" draw:fill-color="#ff8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false"/>
      <style:graphic-properties draw:stroke="none" svg:stroke-width="0.08cm" svg:stroke-color="#ff4000" draw:fill-color="#ff4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false"/>
      <style:graphic-properties draw:stroke="none" svg:stroke-width="0.08cm" svg:stroke-color="#55308d" draw:fill-color="#55308d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solid" draw:fill-color="#dddddd"/>
    </style:style>
    <style:style style:name="ch14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20.061cm" svg:height="13.407cm" xlink:href=".." xlink:type="simple" chart:class="chart:scatter" chart:style-name="ch1">
        <chart:title svg:x="8.523cm" svg:y="0.404cm" chart:style-name="ch2">
          <text:p>Filter Benefits</text:p>
        </chart:title>
        <chart:subtitle svg:x="13.869cm" svg:y="0.942cm" chart:style-name="ch3">
          <text:p><text:span text:style-name="T1">Does KF Offer Benefit?</text:span></text:p>
        </chart:subtitle>
        <chart:legend chart:legend-position="end" svg:x="16.265cm" svg:y="5.897cm" style:legend-expansion="high" chart:style-name="ch4"/>
        <chart:plot-area chart:style-name="ch5" svg:x="0.776cm" svg:y="1.396cm" svg:width="16.102cm" svg:height="11.038cm">
          <chart:coordinate-region svg:x="1.727cm" svg:y="1.599cm" svg:width="14.899cm" svg:height="10.182cm"/>
          <chart:axis chart:dimension="x" chart:name="primary-x" chart:style-name="ch6">
            <chart:title svg:x="6.44cm" svg:y="12.702cm" chart:style-name="ch2">
              <text:p><text:span text:style-name="T2">Attenuation, ratio (small is better)</text:span></text:p>
            </chart:title>
          </chart:axis>
          <chart:axis chart:dimension="y" chart:name="primary-y" chart:style-name="ch7">
            <chart:title svg:x="0cm" svg:y="9.204cm" chart:style-name="ch8">
              <text:p><text:span text:style-name="T2">Loss, lag time s (small is better)</text:span></text:p>
            </chart:title>
            <chart:grid chart:style-name="ch9" chart:class="major"/>
          </chart:axis>
          <chart:series chart:style-name="ch10" chart:values-cell-range-address="'lpf_tau 0.1'.F2:'lpf_tau 0.1'.F11" chart:label-cell-address="'lpf_tau 0.1'.F1:'lpf_tau 0.1'.F1" chart:class="chart:scatter">
            <chart:domain table:cell-range-address="'lpf_tau 0.1'.D2:'lpf_tau 0.1'.D11"/>
            <chart:data-point chart:repeated="10"/>
          </chart:series>
          <chart:series chart:style-name="ch11" chart:values-cell-range-address="'lpf_tau 0'.F2:'lpf_tau 0'.F11" chart:label-cell-address="'lpf_tau 0'.F1:'lpf_tau 0'.F1" chart:class="chart:scatter">
            <chart:domain table:cell-range-address="'lpf_tau 0'.D2:'lpf_tau 0'.D11"/>
            <chart:data-point chart:repeated="10"/>
          </chart:series>
          <chart:series chart:style-name="ch12" chart:values-cell-range-address="'Lag only'.F2:'Lag only'.F5" chart:label-cell-address="'Lag only'.F1:'Lag only'.F1" chart:class="chart:scatter">
            <chart:domain table:cell-range-address="'Lag only'.D2:'Lag only'.D5"/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 tau_3db – tau 0.1</text:p>
                <draw:g>
                  <svg:desc>'lpf_tau 0.1'.F1:'lpf_tau 0.1'.F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 tau_3db – tau 0</text:p>
                <draw:g>
                  <svg:desc>'lpf_tau 0'.F1:'lpf_tau 0'.F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 tau_3db – lag only</text:p>
                <draw:g>
                  <svg:desc>'Lag only'.F1:'Lag only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94699">
                <text:p>0.494699</text:p>
                <draw:g>
                  <svg:desc>'lpf_tau 0.1'.D2:'lpf_tau 0.1'.D11</svg:desc>
                </draw:g>
              </table:table-cell>
              <table:table-cell office:value-type="float" office:value="0.270918">
                <text:p>0.270918</text:p>
                <draw:g>
                  <svg:desc>'lpf_tau 0.1'.F2:'lpf_tau 0.1'.F11</svg:desc>
                </draw:g>
              </table:table-cell>
              <table:table-cell office:value-type="float" office:value="0.602256">
                <text:p>0.602256</text:p>
                <draw:g>
                  <svg:desc>'lpf_tau 0'.D2:'lpf_tau 0'.D11</svg:desc>
                </draw:g>
              </table:table-cell>
              <table:table-cell office:value-type="float" office:value="0.165183">
                <text:p>0.165183</text:p>
                <draw:g>
                  <svg:desc>'lpf_tau 0'.F2:'lpf_tau 0'.F11</svg:desc>
                </draw:g>
              </table:table-cell>
              <table:table-cell office:value-type="float" office:value="0.582069">
                <text:p>0.582069</text:p>
                <draw:g>
                  <svg:desc>'Lag only'.D2:'Lag only'.D5</svg:desc>
                </draw:g>
              </table:table-cell>
              <table:table-cell office:value-type="float" office:value="0.049928">
                <text:p>0.049928</text:p>
                <draw:g>
                  <svg:desc>'Lag only'.F2:'Lag only'.F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89864">
                <text:p>0.489864</text:p>
              </table:table-cell>
              <table:table-cell office:value-type="float" office:value="0.144996">
                <text:p>0.144996</text:p>
              </table:table-cell>
              <table:table-cell office:value-type="float" office:value="0.601113">
                <text:p>0.601113</text:p>
              </table:table-cell>
              <table:table-cell office:value-type="float" office:value="0.122664">
                <text:p>0.122664</text:p>
              </table:table-cell>
              <table:table-cell office:value-type="float" office:value="0.482389">
                <text:p>0.482389</text:p>
              </table:table-cell>
              <table:table-cell office:value-type="float" office:value="0.100957">
                <text:p>0.1009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97395">
                <text:p>0.497395</text:p>
              </table:table-cell>
              <table:table-cell office:value-type="float" office:value="0.270918">
                <text:p>0.270918</text:p>
              </table:table-cell>
              <table:table-cell office:value-type="float" office:value="0.60248">
                <text:p>0.60248</text:p>
              </table:table-cell>
              <table:table-cell office:value-type="float" office:value="0.229459">
                <text:p>0.229459</text:p>
              </table:table-cell>
              <table:table-cell office:value-type="float" office:value="0.439789">
                <text:p>0.439789</text:p>
              </table:table-cell>
              <table:table-cell office:value-type="float" office:value="0.157445">
                <text:p>0.1574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97393">
                <text:p>0.497393</text:p>
              </table:table-cell>
              <table:table-cell office:value-type="float" office:value="0.270918">
                <text:p>0.270918</text:p>
              </table:table-cell>
              <table:table-cell office:value-type="float" office:value="0.602473">
                <text:p>0.602473</text:p>
              </table:table-cell>
              <table:table-cell office:value-type="float" office:value="0.229459">
                <text:p>0.229459</text:p>
              </table:table-cell>
              <table:table-cell office:value-type="float" office:value="0.380744">
                <text:p>0.380744</text:p>
              </table:table-cell>
              <table:table-cell office:value-type="float" office:value="0.270918">
                <text:p>0.2709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89865">
                <text:p>0.489865</text:p>
              </table:table-cell>
              <table:table-cell office:value-type="float" office:value="0.144996">
                <text:p>0.144996</text:p>
              </table:table-cell>
              <table:table-cell office:value-type="float" office:value="0.601114">
                <text:p>0.601114</text:p>
              </table:table-cell>
              <table:table-cell office:value-type="float" office:value="0.122664">
                <text:p>0.122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89865">
                <text:p>0.489865</text:p>
              </table:table-cell>
              <table:table-cell office:value-type="float" office:value="0.144996">
                <text:p>0.144996</text:p>
              </table:table-cell>
              <table:table-cell office:value-type="float" office:value="0.601114">
                <text:p>0.601114</text:p>
              </table:table-cell>
              <table:table-cell office:value-type="float" office:value="0.122664">
                <text:p>0.122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99648">
                <text:p>0.499648</text:p>
              </table:table-cell>
              <table:table-cell office:value-type="float" office:value="0.10574">
                <text:p>0.10574</text:p>
              </table:table-cell>
              <table:table-cell office:value-type="float" office:value="0.669507">
                <text:p>0.669507</text:p>
              </table:table-cell>
              <table:table-cell office:value-type="float" office:value="0.08406">
                <text:p>0.08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94699">
                <text:p>0.494699</text:p>
              </table:table-cell>
              <table:table-cell office:value-type="float" office:value="0.270918">
                <text:p>0.270918</text:p>
              </table:table-cell>
              <table:table-cell office:value-type="float" office:value="0.602257">
                <text:p>0.602257</text:p>
              </table:table-cell>
              <table:table-cell office:value-type="float" office:value="0.165183">
                <text:p>0.165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4699">
                <text:p>0.494699</text:p>
              </table:table-cell>
              <table:table-cell office:value-type="float" office:value="0.270918">
                <text:p>0.270918</text:p>
              </table:table-cell>
              <table:table-cell office:value-type="float" office:value="0.602255">
                <text:p>0.602255</text:p>
              </table:table-cell>
              <table:table-cell office:value-type="float" office:value="0.165183">
                <text:p>0.165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99648">
                <text:p>0.499648</text:p>
              </table:table-cell>
              <table:table-cell office:value-type="float" office:value="0.10574">
                <text:p>0.10574</text:p>
              </table:table-cell>
              <table:table-cell office:value-type="float" office:value="0.669507">
                <text:p>0.669507</text:p>
              </table:table-cell>
              <table:table-cell office:value-type="float" office:value="0.08406">
                <text:p>0.08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7.2$Windows_X86_64 LibreOffice_project/5cbfd1ab6520636bb5f7b99185aa69bd7456825d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204cm" svg:y="4.198cm" style:legend-expansion="high" chart:style-name="ch2"/>
        <chart:plot-area chart:style-name="ch3" svg:x="0.32cm" svg:y="0.18cm" svg:width="11.564cm" svg:height="8.64cm">
          <chart:coordinate-region svg:x="1.271cm" svg:y="0.383cm" svg:width="10.361cm" svg:height="7.7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Lag only'.F2:'Lag only'.F5" chart:label-cell-address="'Lag only'.F1:'Lag only'.F1" chart:class="chart:scatter">
            <chart:domain table:cell-range-address="'Lag only'.D2:'Lag only'.D5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 tau_3db – lag only</text:p>
                <draw:g>
                  <svg:desc>'Lag only'.F1:'Lag only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82069">
                <text:p>0.582069</text:p>
                <draw:g>
                  <svg:desc>'Lag only'.D2:'Lag only'.D5</svg:desc>
                </draw:g>
              </table:table-cell>
              <table:table-cell office:value-type="float" office:value="0.049928">
                <text:p>0.049928</text:p>
                <draw:g>
                  <svg:desc>'Lag only'.F2:'Lag only'.F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82389">
                <text:p>0.482389</text:p>
              </table:table-cell>
              <table:table-cell office:value-type="float" office:value="0.100957">
                <text:p>0.1009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39789">
                <text:p>0.439789</text:p>
              </table:table-cell>
              <table:table-cell office:value-type="float" office:value="0.157445">
                <text:p>0.1574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80744">
                <text:p>0.380744</text:p>
              </table:table-cell>
              <table:table-cell office:value-type="float" office:value="0.270918">
                <text:p>0.2709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7.2$Windows_X86_64 LibreOffice_project/5cbfd1ab6520636bb5f7b99185aa69bd7456825d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title svg:x="7.024cm" svg:y="0.316cm" chart:style-name="ch2">
          <text:p>lpf_tau 0</text:p>
        </chart:title>
        <chart:legend chart:legend-position="end" svg:x="12.644cm" svg:y="4.198cm" style:legend-expansion="high" chart:style-name="ch3"/>
        <chart:plot-area chart:style-name="ch4" svg:x="1.321cm" svg:y="1.301cm" svg:width="11.003cm" svg:height="6.548cm">
          <chart:coordinate-region svg:x="2.272cm" svg:y="1.503cm" svg:width="9.8cm" svg:height="5.693cm"/>
          <chart:axis chart:dimension="x" chart:name="primary-x" chart:style-name="ch5">
            <chart:title svg:x="4.877cm" svg:y="8.029cm" chart:style-name="ch2">
              <text:p><text:span text:style-name="T1">Attenuation (small is more)</text:span></text:p>
            </chart:title>
          </chart:axis>
          <chart:axis chart:dimension="y" chart:name="primary-y" chart:style-name="ch6">
            <chart:title svg:x="0.451cm" svg:y="6.264cm" chart:style-name="ch7">
              <text:p><text:span text:style-name="T1">Loss, s (small is better)</text:span></text:p>
            </chart:title>
            <chart:grid chart:style-name="ch8" chart:class="major"/>
          </chart:axis>
          <chart:series chart:style-name="ch9" chart:values-cell-range-address="'lpf_tau 0'.F2:'lpf_tau 0'.F11" chart:label-cell-address="'lpf_tau 0'.F1:'lpf_tau 0'.F1" chart:class="chart:scatter">
            <chart:domain table:cell-range-address="'lpf_tau 0'.D2:'lpf_tau 0'.D11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 tau_3db – tau 0</text:p>
                <draw:g>
                  <svg:desc>'lpf_tau 0'.F1:'lpf_tau 0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02256">
                <text:p>0.602256</text:p>
                <draw:g>
                  <svg:desc>'lpf_tau 0'.D2:'lpf_tau 0'.D11</svg:desc>
                </draw:g>
              </table:table-cell>
              <table:table-cell office:value-type="float" office:value="0.165183">
                <text:p>0.165183</text:p>
                <draw:g>
                  <svg:desc>'lpf_tau 0'.F2:'lpf_tau 0'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01113">
                <text:p>0.601113</text:p>
              </table:table-cell>
              <table:table-cell office:value-type="float" office:value="0.122664">
                <text:p>0.1226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0248">
                <text:p>0.60248</text:p>
              </table:table-cell>
              <table:table-cell office:value-type="float" office:value="0.229459">
                <text:p>0.2294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02473">
                <text:p>0.602473</text:p>
              </table:table-cell>
              <table:table-cell office:value-type="float" office:value="0.229459">
                <text:p>0.2294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01114">
                <text:p>0.601114</text:p>
              </table:table-cell>
              <table:table-cell office:value-type="float" office:value="0.122664">
                <text:p>0.1226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01114">
                <text:p>0.601114</text:p>
              </table:table-cell>
              <table:table-cell office:value-type="float" office:value="0.122664">
                <text:p>0.1226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69507">
                <text:p>0.669507</text:p>
              </table:table-cell>
              <table:table-cell office:value-type="float" office:value="0.08406">
                <text:p>0.084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02257">
                <text:p>0.602257</text:p>
              </table:table-cell>
              <table:table-cell office:value-type="float" office:value="0.165183">
                <text:p>0.1651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02255">
                <text:p>0.602255</text:p>
              </table:table-cell>
              <table:table-cell office:value-type="float" office:value="0.165183">
                <text:p>0.1651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69507">
                <text:p>0.669507</text:p>
              </table:table-cell>
              <table:table-cell office:value-type="float" office:value="0.08406">
                <text:p>0.0840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7.2$Windows_X86_64 LibreOffice_project/5cbfd1ab6520636bb5f7b99185aa69bd7456825d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8000" draw:fill-color="#ff8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ff4000" draw:fill-color="#ff4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55308d" draw:fill-color="#55308d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8.809cm" svg:height="13.419cm" xlink:href=".." xlink:type="simple" chart:class="chart:scatter" chart:style-name="ch1">
        <chart:title svg:x="7.897cm" svg:y="0.404cm" chart:style-name="ch2">
          <text:p>Filter Benefits</text:p>
        </chart:title>
        <chart:subtitle svg:x="7.364cm" svg:y="1.477cm" chart:style-name="ch2">
          <text:p><text:span text:style-name="T1">Does KF Offer Benefit?</text:span></text:p>
        </chart:subtitle>
        <chart:legend chart:legend-position="end" svg:x="15.013cm" svg:y="5.903cm" style:legend-expansion="high" chart:style-name="ch3"/>
        <chart:plot-area chart:style-name="ch4" svg:x="1.377cm" svg:y="2.402cm" svg:width="13.26cm" svg:height="9.778cm">
          <chart:coordinate-region svg:x="2.328cm" svg:y="2.605cm" svg:width="12.057cm" svg:height="8.922cm"/>
          <chart:axis chart:dimension="x" chart:name="primary-x" chart:style-name="ch5">
            <chart:title svg:x="5.62cm" svg:y="12.448cm" chart:style-name="ch2">
              <text:p><text:span text:style-name="T2">Attenuation, ratio (small is better)</text:span></text:p>
            </chart:title>
          </chart:axis>
          <chart:axis chart:dimension="y" chart:name="primary-y" chart:style-name="ch6">
            <chart:title svg:x="0.451cm" svg:y="9.58cm" chart:style-name="ch7">
              <text:p><text:span text:style-name="T2">Loss, lag time s (small is better)</text:span></text:p>
            </chart:title>
            <chart:grid chart:style-name="ch8" chart:class="major"/>
          </chart:axis>
          <chart:series chart:style-name="ch9" chart:values-cell-range-address="'lpf_tau 0.1'.F2:'lpf_tau 0.1'.F11" chart:label-cell-address="'lpf_tau 0.1'.F1:'lpf_tau 0.1'.F1" chart:class="chart:scatter">
            <chart:domain table:cell-range-address="'lpf_tau 0.1'.D2:'lpf_tau 0.1'.D11"/>
            <chart:data-point chart:repeated="10"/>
          </chart:series>
          <chart:series chart:style-name="ch10" chart:values-cell-range-address="'lpf_tau 0'.F2:'lpf_tau 0'.F11" chart:label-cell-address="'lpf_tau 0'.F1:'lpf_tau 0'.F1" chart:class="chart:scatter">
            <chart:domain table:cell-range-address="'lpf_tau 0'.D2:'lpf_tau 0'.D11"/>
            <chart:data-point chart:repeated="10"/>
          </chart:series>
          <chart:series chart:style-name="ch11" chart:values-cell-range-address="'Lag only'.F2:'Lag only'.F5" chart:label-cell-address="'Lag only'.F1:'Lag only'.F1" chart:class="chart:scatter">
            <chart:domain table:cell-range-address="'Lag only'.D2:'Lag only'.D5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 tau_3db – tau 0.1</text:p>
                <draw:g>
                  <svg:desc>'lpf_tau 0.1'.F1:'lpf_tau 0.1'.F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 tau_3db – tau 0</text:p>
                <draw:g>
                  <svg:desc>'lpf_tau 0'.F1:'lpf_tau 0'.F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 tau_3db – lag only</text:p>
                <draw:g>
                  <svg:desc>'Lag only'.F1:'Lag only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94699">
                <text:p>0.494699</text:p>
                <draw:g>
                  <svg:desc>'lpf_tau 0.1'.D2:'lpf_tau 0.1'.D11</svg:desc>
                </draw:g>
              </table:table-cell>
              <table:table-cell office:value-type="float" office:value="0.270918">
                <text:p>0.270918</text:p>
                <draw:g>
                  <svg:desc>'lpf_tau 0.1'.F2:'lpf_tau 0.1'.F11</svg:desc>
                </draw:g>
              </table:table-cell>
              <table:table-cell office:value-type="float" office:value="0.602256">
                <text:p>0.602256</text:p>
                <draw:g>
                  <svg:desc>'lpf_tau 0'.D2:'lpf_tau 0'.D11</svg:desc>
                </draw:g>
              </table:table-cell>
              <table:table-cell office:value-type="float" office:value="0.165183">
                <text:p>0.165183</text:p>
                <draw:g>
                  <svg:desc>'lpf_tau 0'.F2:'lpf_tau 0'.F11</svg:desc>
                </draw:g>
              </table:table-cell>
              <table:table-cell office:value-type="float" office:value="0.582069">
                <text:p>0.582069</text:p>
                <draw:g>
                  <svg:desc>'Lag only'.D2:'Lag only'.D5</svg:desc>
                </draw:g>
              </table:table-cell>
              <table:table-cell office:value-type="float" office:value="0.049928">
                <text:p>0.049928</text:p>
                <draw:g>
                  <svg:desc>'Lag only'.F2:'Lag only'.F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89864">
                <text:p>0.489864</text:p>
              </table:table-cell>
              <table:table-cell office:value-type="float" office:value="0.144996">
                <text:p>0.144996</text:p>
              </table:table-cell>
              <table:table-cell office:value-type="float" office:value="0.601113">
                <text:p>0.601113</text:p>
              </table:table-cell>
              <table:table-cell office:value-type="float" office:value="0.122664">
                <text:p>0.122664</text:p>
              </table:table-cell>
              <table:table-cell office:value-type="float" office:value="0.482389">
                <text:p>0.482389</text:p>
              </table:table-cell>
              <table:table-cell office:value-type="float" office:value="0.100957">
                <text:p>0.1009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97395">
                <text:p>0.497395</text:p>
              </table:table-cell>
              <table:table-cell office:value-type="float" office:value="0.270918">
                <text:p>0.270918</text:p>
              </table:table-cell>
              <table:table-cell office:value-type="float" office:value="0.60248">
                <text:p>0.60248</text:p>
              </table:table-cell>
              <table:table-cell office:value-type="float" office:value="0.229459">
                <text:p>0.229459</text:p>
              </table:table-cell>
              <table:table-cell office:value-type="float" office:value="0.439789">
                <text:p>0.439789</text:p>
              </table:table-cell>
              <table:table-cell office:value-type="float" office:value="0.157445">
                <text:p>0.1574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97393">
                <text:p>0.497393</text:p>
              </table:table-cell>
              <table:table-cell office:value-type="float" office:value="0.270918">
                <text:p>0.270918</text:p>
              </table:table-cell>
              <table:table-cell office:value-type="float" office:value="0.602473">
                <text:p>0.602473</text:p>
              </table:table-cell>
              <table:table-cell office:value-type="float" office:value="0.229459">
                <text:p>0.229459</text:p>
              </table:table-cell>
              <table:table-cell office:value-type="float" office:value="0.380744">
                <text:p>0.380744</text:p>
              </table:table-cell>
              <table:table-cell office:value-type="float" office:value="0.270918">
                <text:p>0.2709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89865">
                <text:p>0.489865</text:p>
              </table:table-cell>
              <table:table-cell office:value-type="float" office:value="0.144996">
                <text:p>0.144996</text:p>
              </table:table-cell>
              <table:table-cell office:value-type="float" office:value="0.601114">
                <text:p>0.601114</text:p>
              </table:table-cell>
              <table:table-cell office:value-type="float" office:value="0.122664">
                <text:p>0.122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89865">
                <text:p>0.489865</text:p>
              </table:table-cell>
              <table:table-cell office:value-type="float" office:value="0.144996">
                <text:p>0.144996</text:p>
              </table:table-cell>
              <table:table-cell office:value-type="float" office:value="0.601114">
                <text:p>0.601114</text:p>
              </table:table-cell>
              <table:table-cell office:value-type="float" office:value="0.122664">
                <text:p>0.122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99648">
                <text:p>0.499648</text:p>
              </table:table-cell>
              <table:table-cell office:value-type="float" office:value="0.10574">
                <text:p>0.10574</text:p>
              </table:table-cell>
              <table:table-cell office:value-type="float" office:value="0.669507">
                <text:p>0.669507</text:p>
              </table:table-cell>
              <table:table-cell office:value-type="float" office:value="0.08406">
                <text:p>0.08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94699">
                <text:p>0.494699</text:p>
              </table:table-cell>
              <table:table-cell office:value-type="float" office:value="0.270918">
                <text:p>0.270918</text:p>
              </table:table-cell>
              <table:table-cell office:value-type="float" office:value="0.602257">
                <text:p>0.602257</text:p>
              </table:table-cell>
              <table:table-cell office:value-type="float" office:value="0.165183">
                <text:p>0.165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4699">
                <text:p>0.494699</text:p>
              </table:table-cell>
              <table:table-cell office:value-type="float" office:value="0.270918">
                <text:p>0.270918</text:p>
              </table:table-cell>
              <table:table-cell office:value-type="float" office:value="0.602255">
                <text:p>0.602255</text:p>
              </table:table-cell>
              <table:table-cell office:value-type="float" office:value="0.165183">
                <text:p>0.165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99648">
                <text:p>0.499648</text:p>
              </table:table-cell>
              <table:table-cell office:value-type="float" office:value="0.10574">
                <text:p>0.10574</text:p>
              </table:table-cell>
              <table:table-cell office:value-type="float" office:value="0.669507">
                <text:p>0.669507</text:p>
              </table:table-cell>
              <table:table-cell office:value-type="float" office:value="0.08406">
                <text:p>0.08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7.2$Windows_X86_64 LibreOffice_project/5cbfd1ab6520636bb5f7b99185aa69bd7456825d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